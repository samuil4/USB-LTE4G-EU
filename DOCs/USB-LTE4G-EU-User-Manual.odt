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F0000040671E81F16.png" manifest:media-type="image/png"/>
  <manifest:file-entry manifest:full-path="Pictures/10000001000000F000000041313C435F.png" manifest:media-type="image/png"/>
  <manifest:file-entry manifest:full-path="Pictures/1000000100000305000004096E85C99C.png" manifest:media-type="image/png"/>
  <manifest:file-entry manifest:full-path="Pictures/10000000000007D0000007D0AD3DE681.jpg" manifest:media-type="image/jpeg"/>
  <manifest:file-entry manifest:full-path="Pictures/10000001000002D0000002E0D0A8A83F.png" manifest:media-type="image/png"/>
  <manifest:file-entry manifest:full-path="Pictures/100000010000016E0000005C95F72537.png" manifest:media-type="image/png"/>
  <manifest:file-entry manifest:full-path="Pictures/10000001000003090000033DC99E53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9118in" style:rel-column-width="37019*"/>
    </style:style>
    <style:style style:name="Table1.B" style:family="table-column">
      <style:table-column-properties style:column-width="3.0132in" style:rel-column-width="28516*"/>
    </style:style>
    <style:style style:name="Table1.A1" style:family="table-cell">
      <style:table-cell-properties fo:padding="0.0382in" fo:border="none"/>
    </style:style>
    <style:style style:name="P1" style:family="paragraph" style:parent-style-name="Text_20_body">
      <style:paragraph-properties fo:line-height="0.8465in"/>
      <style:text-properties officeooo:paragraph-rsid="00a0c4d1"/>
    </style:style>
    <style:style style:name="P2" style:family="paragraph" style:parent-style-name="Text_20_body">
      <style:paragraph-properties fo:line-height="0.8465in" fo:text-align="center" style:justify-single-word="false"/>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6pt" fo:font-style="normal" fo:font-weight="normal" officeooo:rsid="002cb88f" officeooo:paragraph-rsid="00b5133e" fo:background-color="transparent" style:font-size-asian="16pt" style:font-style-asian="normal" style:font-weight-asian="normal" style:font-size-complex="16pt" style:font-style-complex="normal" style:font-weight-complex="normal"/>
    </style:style>
    <style:style style:name="P4"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16pt" fo:font-style="normal" fo:font-weight="normal" officeooo:rsid="002cb88f" officeooo:paragraph-rsid="00b5133e" fo:background-color="transparent" style:font-size-asian="16pt" style:font-style-asian="normal" style:font-weight-asian="normal" style:font-size-complex="16pt" style:font-style-complex="normal" style:font-weight-complex="normal"/>
    </style:style>
    <style:style style:name="P5"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9252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list-style-name="">
      <style:paragraph-properties fo:break-before="page"/>
      <style:text-properties officeooo:rsid="00b55a05" officeooo:paragraph-rsid="00b55a05"/>
    </style:style>
    <style:style style:name="P10" style:family="paragraph" style:parent-style-name="Text_20_body">
      <style:text-properties officeooo:paragraph-rsid="00a0c4d1"/>
    </style:style>
    <style:style style:name="P11" style:family="paragraph" style:parent-style-name="Text_20_body">
      <style:text-properties officeooo:paragraph-rsid="00b35c3d"/>
    </style:style>
    <style:style style:name="P12" style:family="paragraph" style:parent-style-name="Text_20_body">
      <style:text-properties officeooo:rsid="00b35c3d" officeooo:paragraph-rsid="00be8d24"/>
    </style:style>
    <style:style style:name="P13" style:family="paragraph" style:parent-style-name="Text_20_body">
      <style:text-properties officeooo:paragraph-rsid="00b30e5c"/>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Text_20_body" style:list-style-name="L1">
      <style:text-properties officeooo:paragraph-rsid="00bfb180"/>
    </style:style>
    <style:style style:name="P17"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bfb180"/>
    </style:style>
    <style:style style:name="P18"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a0c4d1"/>
    </style:style>
    <style:style style:name="P19"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c56891"/>
    </style:style>
    <style:style style:name="P20" style:family="paragraph" style:parent-style-name="Text_20_body" style:list-style-name="L2">
      <style:text-properties officeooo:rsid="00bfb180" officeooo:paragraph-rsid="00bfb180"/>
    </style:style>
    <style:style style:name="P21"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a0c4d1"/>
    </style:style>
    <style:style style:name="P22" style:family="paragraph" style:parent-style-name="Text_20_body" style:list-style-name="L2">
      <style:text-properties officeooo:paragraph-rsid="00bfb180"/>
    </style:style>
    <style:style style:name="P23"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c50710"/>
    </style:style>
    <style:style style:name="P24"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bfb180"/>
    </style:style>
    <style:style style:name="P25" style:family="paragraph" style:parent-style-name="Standard">
      <style:text-properties officeooo:rsid="00b603af" officeooo:paragraph-rsid="00b603af"/>
    </style:style>
    <style:style style:name="P26" style:family="paragraph" style:parent-style-name="Text_20_body" style:list-style-name="L3">
      <style:text-properties officeooo:paragraph-rsid="00b6451c"/>
    </style:style>
    <style:style style:name="P27" style:family="paragraph" style:parent-style-name="Text_20_body" style:list-style-name="L3"/>
    <style:style style:name="P28" style:family="paragraph" style:parent-style-name="Text_20_body">
      <style:text-properties officeooo:rsid="00b603af" officeooo:paragraph-rsid="00b80cbe"/>
    </style:style>
    <style:style style:name="P29" style:family="paragraph" style:parent-style-name="Text_20_body">
      <style:text-properties officeooo:paragraph-rsid="00b6451c"/>
    </style:style>
    <style:style style:name="P30" style:family="paragraph" style:parent-style-name="Text_20_body" style:list-style-name="L3">
      <style:text-properties officeooo:rsid="00b30e5c" officeooo:paragraph-rsid="00a0c4d1"/>
    </style:style>
    <style:style style:name="P31" style:family="paragraph" style:parent-style-name="Text_20_body">
      <style:text-properties officeooo:rsid="00b6451c" officeooo:paragraph-rsid="00b6451c"/>
    </style:style>
    <style:style style:name="P32" style:family="paragraph" style:parent-style-name="Text_20_body" style:list-style-name="L4">
      <style:text-properties officeooo:rsid="00b6451c" officeooo:paragraph-rsid="00b6451c"/>
    </style:style>
    <style:style style:name="P33" style:family="paragraph" style:parent-style-name="Text_20_body" style:list-style-name="L4">
      <style:text-properties officeooo:rsid="00b80cbe" officeooo:paragraph-rsid="00b80cbe"/>
    </style:style>
    <style:style style:name="P34" style:family="paragraph" style:parent-style-name="Text_20_body" style:list-style-name="L4">
      <style:text-properties officeooo:rsid="00c605c6" officeooo:paragraph-rsid="00c605c6"/>
    </style:style>
    <style:style style:name="P35" style:family="paragraph" style:parent-style-name="Text_20_body">
      <style:text-properties officeooo:rsid="00b603af" officeooo:paragraph-rsid="00b603af"/>
    </style:style>
    <style:style style:name="P36" style:family="paragraph" style:parent-style-name="Heading_20_2">
      <style:paragraph-properties fo:break-before="page"/>
      <style:text-properties officeooo:paragraph-rsid="00b80cbe"/>
    </style:style>
    <style:style style:name="P37" style:family="paragraph" style:parent-style-name="Text_20_body">
      <style:text-properties officeooo:rsid="00b80cbe" officeooo:paragraph-rsid="00b80cbe"/>
    </style:style>
    <style:style style:name="P38" style:family="paragraph" style:parent-style-name="Text_20_body">
      <style:text-properties officeooo:rsid="00b8c5f9" officeooo:paragraph-rsid="00b8c5f9"/>
    </style:style>
    <style:style style:name="P39" style:family="paragraph" style:parent-style-name="Heading_20_1">
      <style:paragraph-properties fo:break-before="page"/>
    </style:style>
    <style:style style:name="P40" style:family="paragraph" style:parent-style-name="Heading_20_2">
      <style:text-properties officeooo:paragraph-rsid="00b6451c"/>
    </style:style>
    <style:style style:name="P41" style:family="paragraph" style:parent-style-name="Text_20_body">
      <style:text-properties officeooo:rsid="00ca151c" officeooo:paragraph-rsid="00ca151c"/>
    </style:style>
    <style:style style:name="P42" style:family="paragraph" style:parent-style-name="Text_20_body">
      <style:text-properties officeooo:rsid="00cc6ffb" officeooo:paragraph-rsid="00cc6ffb"/>
    </style:style>
    <style:style style:name="P43" style:family="paragraph" style:parent-style-name="Text_20_body">
      <style:text-properties officeooo:paragraph-rsid="00cdb8c5"/>
    </style:style>
    <style:style style:name="P44" style:family="paragraph" style:parent-style-name="Text_20_body">
      <style:text-properties officeooo:rsid="00da0bd6" officeooo:paragraph-rsid="00da0bd6"/>
    </style:style>
    <style:style style:name="P45" style:family="paragraph" style:parent-style-name="Text_20_body">
      <style:text-properties fo:color="#0066cc" loext:opacity="100%" officeooo:rsid="00489c85"/>
    </style:style>
    <style:style style:name="P46" style:family="paragraph" style:parent-style-name="Heading_20_1">
      <style:text-properties officeooo:paragraph-rsid="008020c0"/>
    </style:style>
    <style:style style:name="P47" style:family="paragraph" style:parent-style-name="Text_20_body">
      <style:text-properties officeooo:paragraph-rsid="008020c0"/>
    </style:style>
    <style:style style:name="P48" style:family="paragraph" style:parent-style-name="Text_20_body">
      <style:text-properties officeooo:rsid="00a81806" officeooo:paragraph-rsid="00a81806"/>
    </style:style>
    <style:style style:name="P49" style:family="paragraph">
      <loext:graphic-properties draw:fill="none" draw:fill-color="#ffffff"/>
    </style:style>
    <style:style style:name="P50" style:family="paragraph" style:parent-style-name="Text_20_body">
      <style:text-properties officeooo:rsid="00aac4b4" officeooo:paragraph-rsid="00aac4b4"/>
    </style:style>
    <style:style style:name="P51" style:family="paragraph">
      <style:paragraph-properties fo:text-align="center"/>
    </style:style>
    <style:style style:name="P52" style:family="paragraph" style:parent-style-name="Heading_20_2">
      <style:paragraph-properties fo:break-before="page"/>
      <style:text-properties officeooo:paragraph-rsid="00b78a00"/>
    </style:style>
    <style:style style:name="P53" style:family="paragraph" style:parent-style-name="Text_20_body">
      <style:text-properties officeooo:paragraph-rsid="00b78a00"/>
    </style:style>
    <style:style style:name="P54" style:family="paragraph">
      <loext:graphic-properties draw:fill-color="#ff0000"/>
      <style:paragraph-properties fo:text-align="center"/>
    </style:style>
    <style:style style:name="P55" style:family="paragraph" style:parent-style-name="Text_20_body">
      <style:text-properties officeooo:rsid="00d9053d" officeooo:paragraph-rsid="00d9053d"/>
    </style:style>
    <style:style style:name="P56" style:family="paragraph" style:parent-style-name="Text_20_body">
      <style:text-properties fo:font-style="normal" fo:font-weight="bold" officeooo:rsid="00ca151c" officeooo:paragraph-rsid="00d9053d" style:font-style-asian="normal" style:font-weight-asian="bold" style:font-style-complex="normal" style:font-weight-complex="bold"/>
    </style:style>
    <style:style style:name="P57" style:family="paragraph" style:parent-style-name="Text_20_body">
      <style:text-properties fo:font-weight="bold" officeooo:rsid="00c41e76" officeooo:paragraph-rsid="00c41e76" style:font-weight-asian="bold" style:font-weight-complex="bold"/>
    </style:style>
    <style:style style:name="P58" style:family="paragraph" style:parent-style-name="Text_20_body">
      <style:text-properties officeooo:rsid="00c50710" officeooo:paragraph-rsid="00d9053d"/>
    </style:style>
    <style:style style:name="P59" style:family="paragraph" style:parent-style-name="Standard">
      <style:text-properties officeooo:paragraph-rsid="00d79519"/>
    </style:style>
    <style:style style:name="P60" style:family="paragraph" style:parent-style-name="Standard" style:list-style-name="L5"/>
    <style:style style:name="P61" style:family="paragraph" style:parent-style-name="Text_20_body">
      <style:text-properties officeooo:rsid="00d79519" officeooo:paragraph-rsid="00d79519"/>
    </style:style>
    <style:style style:name="P62" style:family="paragraph" style:parent-style-name="Text_20_body">
      <style:text-properties officeooo:rsid="00b80cbe" officeooo:paragraph-rsid="00db576e"/>
    </style:style>
    <style:style style:name="P63" style:family="paragraph" style:parent-style-name="Text_20_body" style:list-style-name="L6">
      <style:text-properties officeooo:rsid="00aead22" officeooo:paragraph-rsid="00aead22"/>
    </style:style>
    <style:style style:name="P64" style:family="paragraph" style:parent-style-name="Heading_20_1">
      <style:paragraph-properties fo:break-before="page"/>
      <style:text-properties officeooo:paragraph-rsid="00bb1517"/>
    </style:style>
    <style:style style:name="P65" style:family="paragraph" style:parent-style-name="Text_20_body">
      <style:text-properties officeooo:rsid="00549c04" officeooo:paragraph-rsid="00549c04"/>
    </style:style>
    <style:style style:name="P66" style:family="paragraph" style:parent-style-name="Text_20_body">
      <style:text-properties officeooo:rsid="009da82c" officeooo:paragraph-rsid="009da82c"/>
    </style:style>
    <style:style style:name="T1" style:family="text">
      <style:text-properties fo:color="#0066b3" loext:opacity="100%" style:font-name="Noto Sans CJK JP Bold" fo:font-size="60pt" fo:font-style="normal" style:text-underline-style="solid" style:text-underline-width="auto" style:text-underline-color="font-color" fo:font-weight="normal" officeooo:rsid="00a0c4d1" style:font-size-asian="60pt" style:font-style-asian="normal" style:font-weight-asian="normal" style:font-size-complex="60pt" style:font-style-complex="normal" style:font-weight-complex="normal"/>
    </style:style>
    <style:style style:name="T2" style:family="text">
      <style:text-properties fo:color="#0066b3" loext:opacity="100%" style:font-name="Noto Sans CJK JP Bold" fo:font-size="60pt" fo:font-style="normal" style:text-underline-style="solid" style:text-underline-width="auto" style:text-underline-color="font-color" fo:font-weight="normal" officeooo:rsid="00b30e5c" style:font-size-asian="60pt" style:font-style-asian="normal" style:font-weight-asian="normal" style:font-size-complex="60pt" style:font-style-complex="normal" style:font-weight-complex="normal"/>
    </style:style>
    <style:style style:name="T3" style:family="text">
      <style:text-properties officeooo:rsid="00b5133e"/>
    </style:style>
    <style:style style:name="T4" style:family="text">
      <style:text-properties officeooo:rsid="00b35c3d"/>
    </style:style>
    <style:style style:name="T5" style:family="text">
      <style:text-properties officeooo:rsid="00a0c4d1"/>
    </style:style>
    <style:style style:name="T6" style:family="text">
      <style:text-properties officeooo:rsid="00b30e5c"/>
    </style:style>
    <style:style style:name="T7" style:family="text">
      <style:text-properties officeooo:rsid="008020c0"/>
    </style:style>
    <style:style style:name="T8" style:family="text">
      <style:text-properties officeooo:rsid="00253f24"/>
    </style:style>
    <style:style style:name="T9" style:family="text">
      <style:text-properties officeooo:rsid="00b55a05"/>
    </style:style>
    <style:style style:name="T10" style:family="text">
      <style:text-properties officeooo:rsid="0089e77a"/>
    </style:style>
    <style:style style:name="T11" style:family="text">
      <style:text-properties fo:font-variant="normal" fo:text-transform="none" fo:color="#24292e" loext:opacity="100%" style:font-name="Liberation Serif1" fo:font-size="12pt" fo:letter-spacing="normal" fo:font-style="normal"/>
    </style:style>
    <style:style style:name="T12" style:family="text">
      <style:text-properties fo:font-variant="normal" fo:text-transform="none" fo:color="#24292e" loext:opacity="100%" style:font-name="Liberation Serif1" fo:font-size="12pt" fo:letter-spacing="normal" fo:font-style="normal" fo:font-weight="normal"/>
    </style:style>
    <style:style style:name="T13" style:family="text">
      <style:text-properties fo:font-variant="normal" fo:text-transform="none" fo:color="#24292e" loext:opacity="100%" style:font-name="Liberation Serif1" fo:font-size="12pt" fo:letter-spacing="normal" fo:font-style="normal" fo:font-weight="normal" officeooo:rsid="00b35c3d"/>
    </style:style>
    <style:style style:name="T14" style:family="text">
      <style:text-properties fo:font-variant="normal" fo:text-transform="none" fo:color="#24292e" loext:opacity="100%" style:font-name="Liberation Serif1" fo:font-size="12pt" fo:letter-spacing="normal" fo:font-style="normal" fo:font-weight="normal" officeooo:rsid="00bcc4ae"/>
    </style:style>
    <style:style style:name="T15" style:family="text">
      <style:text-properties fo:font-variant="normal" fo:text-transform="none" fo:color="#24292e" loext:opacity="100%" style:font-name="Liberation Serif1" fo:font-size="12pt" fo:letter-spacing="normal" fo:font-style="normal" fo:font-weight="normal" officeooo:rsid="00a0c4d1"/>
    </style:style>
    <style:style style:name="T16" style:family="text">
      <style:text-properties fo:font-variant="normal" fo:text-transform="none" fo:color="#24292e" loext:opacity="100%" style:font-name="Liberation Serif1" fo:font-size="12pt" fo:letter-spacing="normal" fo:font-style="normal" fo:font-weight="normal" officeooo:rsid="00b30e5c"/>
    </style:style>
    <style:style style:name="T17" style:family="text">
      <style:text-properties fo:font-variant="normal" fo:text-transform="none" fo:color="#24292e" loext:opacity="100%" style:font-name="Liberation Serif1" fo:font-size="12pt" fo:letter-spacing="normal" fo:font-style="normal" fo:font-weight="normal" officeooo:rsid="00be8d24"/>
    </style:style>
    <style:style style:name="T18" style:family="text">
      <style:text-properties fo:font-variant="normal" fo:text-transform="none" fo:color="#24292e" loext:opacity="100%" style:font-name="Liberation Serif1" fo:font-size="12pt" fo:letter-spacing="normal" fo:font-style="normal" officeooo:rsid="00a0c4d1"/>
    </style:style>
    <style:style style:name="T19" style:family="text">
      <style:text-properties fo:font-variant="normal" fo:text-transform="none" fo:color="#24292e" loext:opacity="100%" style:font-name="Liberation Serif1" fo:font-size="12pt" fo:letter-spacing="normal" fo:font-style="normal" fo:font-weight="normal" officeooo:rsid="00b80cbe"/>
    </style:style>
    <style:style style:name="T20" style:family="text">
      <style:text-properties fo:font-variant="normal" fo:text-transform="none" fo:color="#24292e" loext:opacity="100%" style:font-name="Liberation Serif1" fo:font-size="12pt" fo:letter-spacing="normal" fo:font-style="normal" fo:font-weight="normal" officeooo:rsid="00bfb180"/>
    </style:style>
    <style:style style:name="T21" style:family="text">
      <style:text-properties fo:font-variant="normal" fo:text-transform="none" fo:color="#24292e" loext:opacity="100%" style:font-name="Liberation Serif1" fo:font-size="12pt" fo:letter-spacing="normal" fo:font-style="normal" fo:font-weight="normal" officeooo:rsid="00c035d6"/>
    </style:style>
    <style:style style:name="T22" style:family="text">
      <style:text-properties fo:font-variant="normal" fo:text-transform="none" fo:color="#24292e" loext:opacity="100%" style:font-name="Liberation Serif1" fo:font-size="12pt" fo:letter-spacing="normal" fo:font-style="normal" fo:font-weight="normal" officeooo:rsid="00c1c5fa"/>
    </style:style>
    <style:style style:name="T23" style:family="text">
      <style:text-properties officeooo:rsid="00be8d24"/>
    </style:style>
    <style:style style:name="T24" style:family="text">
      <style:text-properties officeooo:rsid="00b6451c"/>
    </style:style>
    <style:style style:name="T25" style:family="text">
      <style:text-properties officeooo:rsid="00ca151c"/>
    </style:style>
    <style:style style:name="T26" style:family="text">
      <style:text-properties officeooo:rsid="00b80cbe"/>
    </style:style>
    <style:style style:name="T27" style:family="text">
      <style:text-properties officeooo:rsid="00c8715b"/>
    </style:style>
    <style:style style:name="T28" style:family="text">
      <style:text-properties officeooo:rsid="00b8c5f9"/>
    </style:style>
    <style:style style:name="T29" style:family="text">
      <style:text-properties officeooo:rsid="00bab2a6"/>
    </style:style>
    <style:style style:name="T30" style:family="text">
      <style:text-properties officeooo:rsid="00b78a00"/>
    </style:style>
    <style:style style:name="T31" style:family="text">
      <style:text-properties officeooo:rsid="00cc6ffb"/>
    </style:style>
    <style:style style:name="T32" style:family="text">
      <style:text-properties officeooo:rsid="00cdb8c5"/>
    </style:style>
    <style:style style:name="T33" style:family="text">
      <style:text-properties officeooo:rsid="00da0bd6"/>
    </style:style>
    <style:style style:name="T34" style:family="text">
      <style:text-properties officeooo:rsid="00db576e"/>
    </style:style>
    <style:style style:name="T35" style:family="text">
      <style:text-properties officeooo:rsid="00c50710"/>
    </style:style>
    <style:style style:name="T36" style:family="text">
      <style:text-properties style:font-name="Liberation Serif" fo:font-size="12pt" fo:font-style="normal" fo:font-weight="normal" officeooo:rsid="00d79519" style:font-size-asian="12pt" style:font-style-asian="normal" style:font-weight-asian="normal"/>
    </style:style>
    <style:style style:name="T37" style:family="text">
      <style:text-properties style:font-name="Liberation Serif" fo:font-size="12pt" fo:font-style="normal" fo:font-weight="normal" style:font-size-asian="12pt" style:font-style-asian="normal" style:font-weight-asian="normal"/>
    </style:style>
    <style:style style:name="T38" style:family="text">
      <style:text-properties officeooo:rsid="00d79519"/>
    </style:style>
    <style:style style:name="T39" style:family="text">
      <style:text-properties officeooo:rsid="00de3c51"/>
    </style:style>
    <style:style style:name="T40" style:family="text">
      <style:text-properties fo:font-weight="bold" style:font-weight-asian="bold" style:font-weight-complex="bold"/>
    </style:style>
    <style:style style:name="T41" style:family="text">
      <style:text-properties officeooo:rsid="00ce46f7"/>
    </style:style>
    <style:style style:name="T42" style:family="text">
      <style:text-properties officeooo:rsid="00bb1517"/>
    </style:style>
    <style:style style:name="T43" style:family="text">
      <style:text-properties officeooo:rsid="00bcc4ae"/>
    </style:style>
    <style:style style:name="T44" style:family="text">
      <style:text-properties officeooo:rsid="00bb6c95"/>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5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201in" svg:stroke-color="#ff0000" draw:marker-start-width="0.2in" draw:marker-end-width="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f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0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9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ff0000" draw:marker-start-width="0.2008in" draw:marker-end-width="0.2008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95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201in" svg:stroke-color="#ff0000" draw:marker-start-width="0.1689in" draw:marker-end-width="0.1689in" draw:fill-color="#ff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2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3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
      <text:p text:style-name="Text_20_body"><draw:frame draw:style-name="fr2" draw:name="Image2" text:anchor-type="char" svg:width="3.8252in" svg:height="3.8252in" draw:z-index="12"><draw:image xlink:href="Pictures/10000000000007D0000007D0AD3DE681.jpg" xlink:type="simple" xlink:show="embed" xlink:actuate="onLoad" draw:mime-type="image/jpeg"/></draw:frame></text:p>
      <text:p text:style-name="P1"><text:span text:style-name="T1">USB-</text:span><text:span text:style-name="T2">LTE4G-EU</text:span></text:p>
      <text:p text:style-name="P2">User Manual</text:p>
      <text:p text:style-name="P2"/>
      <table:table table:name="Table1" table:style-name="Table1">
        <table:table-column table:style-name="Table1.A"/>
        <table:table-column table:style-name="Table1.B"/>
        <table:table-row>
          <table:table-cell table:style-name="Table1.A1" office:value-type="string">
            <text:p text:style-name="P3"><text:span text:style-name="T3">D</text:span><text:span text:style-name="T4">ocument </text:span>1.<text:span text:style-name="T5">0</text:span> <text:span text:style-name="T3">J</text:span><text:span text:style-name="T6">une</text:span> 20<text:span text:style-name="T7">2</text:span><text:span text:style-name="T6">6</text:span></text:p>
          </table:table-cell>
          <table:table-cell table:style-name="Table1.A1" office:value-type="string">
            <text:p text:style-name="P4"><text:span text:style-name="T4">www.</text:span><text:span text:style-name="T3">OLIMEX</text:span><text:span text:style-name="T8">.com</text:span></text:p>
          </table:table-cell>
        </table:table-row>
      </table:table>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2487_3915701551" text:style-name="Index_20_Link" text:visited-style-name="Index_20_Link">1. Introduction<text:tab/>3</text:a></text:p>
          <text:p text:style-name="P7"><text:a xlink:type="simple" xlink:href="#__RefHeading___Toc763_467717262" text:style-name="Index_20_Link" text:visited-style-name="Index_20_Link">1.1. What is USB-LTE4G-EU<text:tab/>3</text:a></text:p>
          <text:p text:style-name="P7"><text:a xlink:type="simple" xlink:href="#__RefHeading___Toc765_467717262" text:style-name="Index_20_Link" text:visited-style-name="Index_20_Link">1.2. Board features<text:tab/>4</text:a></text:p>
          <text:p text:style-name="P7"><text:a xlink:type="simple" xlink:href="#__RefHeading___Toc2406_360447580" text:style-name="Index_20_Link" text:visited-style-name="Index_20_Link">1.3. USB-LTE4G-EU ordering options<text:tab/>5</text:a></text:p>
          <text:p text:style-name="P7"><text:a xlink:type="simple" xlink:href="#__RefHeading___Toc2406_360447580%20Copy%201" text:style-name="Index_20_Link" text:visited-style-name="Index_20_Link">1.4. License information<text:tab/>6</text:a></text:p>
          <text:p text:style-name="P6"><text:a xlink:type="simple" xlink:href="#__RefHeading___Toc890_467717262" text:style-name="Index_20_Link" text:visited-style-name="Index_20_Link">2. Quick start up<text:tab/>7</text:a></text:p>
          <text:p text:style-name="P7"><text:a xlink:type="simple" xlink:href="#__RefHeading___Toc2408_360447580%20Copy%201" text:style-name="Index_20_Link" text:visited-style-name="Index_20_Link">2.1. Hardware connection<text:tab/>7</text:a></text:p>
          <text:p text:style-name="P7"><text:a xlink:type="simple" xlink:href="#__RefHeading___Toc2408_360447580" text:style-name="Index_20_Link" text:visited-style-name="Index_20_Link">2.2. USB-LTE4G-EU software installation<text:tab/>7</text:a></text:p>
          <text:p text:style-name="P7"><text:a xlink:type="simple" xlink:href="#__RefHeading___Toc1308_203368328" text:style-name="Index_20_Link" text:visited-style-name="Index_20_Link">2.3. BOX-LTE4G assembly<text:tab/>7</text:a></text:p>
          <text:p text:style-name="P6"><text:a xlink:type="simple" xlink:href="#__RefHeading___Toc2552_3587637980" text:style-name="Index_20_Link" text:visited-style-name="Index_20_Link">3. Hardware<text:tab/>8</text:a></text:p>
          <text:p text:style-name="P7"><text:a xlink:type="simple" xlink:href="#__RefHeading___Toc892_467717262" text:style-name="Index_20_Link" text:visited-style-name="Index_20_Link">3.1. USB-LTE4G-EU top layout<text:tab/>8</text:a></text:p>
          <text:p text:style-name="P7"><text:a xlink:type="simple" xlink:href="#__RefHeading___Toc894_467717262" text:style-name="Index_20_Link" text:visited-style-name="Index_20_Link">3.2. USB-LTE4G-EU bottom layout<text:tab/>9</text:a></text:p>
          <text:p text:style-name="P7"><text:a xlink:type="simple" xlink:href="#__RefHeading___Toc896_467717262" text:style-name="Index_20_Link" text:visited-style-name="Index_20_Link">3.3. EXT1 header<text:tab/>10</text:a></text:p>
          <text:p text:style-name="P7"><text:a xlink:type="simple" xlink:href="#__RefHeading___Toc898_467717262" text:style-name="Index_20_Link" text:visited-style-name="Index_20_Link">3.4. LEDs<text:tab/>11</text:a></text:p>
          <text:p text:style-name="P7"><text:a xlink:type="simple" xlink:href="#__RefHeading___Toc900_467717262" text:style-name="Index_20_Link" text:visited-style-name="Index_20_Link">3.5. DFU1 PTH jumper<text:tab/>11</text:a></text:p>
          <text:p text:style-name="P7"><text:a xlink:type="simple" xlink:href="#__RefHeading___Toc1310_203368328" text:style-name="Index_20_Link" text:visited-style-name="Index_20_Link">3.6. USB-LTE4G-EU board dimensions<text:tab/>12</text:a></text:p>
          <text:p text:style-name="P7"><text:a xlink:type="simple" xlink:href="#__RefHeading___Toc1408_203368328" text:style-name="Index_20_Link" text:visited-style-name="Index_20_Link">3.7. BOX-LTE4G dimensions<text:tab/>12</text:a></text:p>
          <text:p text:style-name="P7"><text:a xlink:type="simple" xlink:href="#__RefHeading___Toc2476_3915701551" text:style-name="Index_20_Link" text:visited-style-name="Index_20_Link">3.8. USB-LTE4G-EU power consumption<text:tab/>13</text:a></text:p>
          <text:p text:style-name="P6"><text:a xlink:type="simple" xlink:href="#__RefHeading___Toc1025_467717262" text:style-name="Index_20_Link" text:visited-style-name="Index_20_Link">4. Software<text:tab/>14</text:a></text:p>
          <text:p text:style-name="P6"><text:a xlink:type="simple" xlink:href="#__RefHeading___Toc1135_467717262" text:style-name="Index_20_Link" text:visited-style-name="Index_20_Link">5. Additional documents<text:tab/>14</text:a></text:p>
          <text:p text:style-name="P6"><text:a xlink:type="simple" xlink:href="#__RefHeading___Toc1027_467717262" text:style-name="Index_20_Link" text:visited-style-name="Index_20_Link">6. Warranty and returns<text:tab/>14</text:a></text:p>
          <text:p text:style-name="P6"><text:a xlink:type="simple" xlink:href="#__RefHeading___Toc2484_3915701551" text:style-name="Index_20_Link" text:visited-style-name="Index_20_Link">7. Document revision history<text:tab/>14</text:a></text:p>
        </text:index-body>
      </text:table-of-content>
      <text:h text:style-name="P8" text:outline-level="1"/>
      <text:h text:style-name="P9" text:outline-level="1"><text:bookmark-start text:name="__RefHeading___Toc2487_3915701551"/>1. Introduction<text:bookmark-end text:name="__RefHeading___Toc2487_3915701551"/></text:h>
      <text:h text:style-name="Heading_20_2" text:outline-level="2"><text:bookmark-start text:name="__RefHeading___Toc763_467717262"/><text:span text:style-name="T9">1.1. </text:span>W<text:span text:style-name="T10">hat</text:span> <text:span text:style-name="T10">is</text:span> <text:span text:style-name="T5">USB-</text:span><text:span text:style-name="T6">LTE4G-EU</text:span><text:bookmark-end text:name="__RefHeading___Toc763_467717262"/></text:h>
      <text:p text:style-name="P10"><text:bookmark-start text:name="__RefHeading___Toc2489_3915701551"/><text:span text:style-name="Strong_20_Emphasis"><text:span text:style-name="T11">USB-LTE4G-EU</text:span></text:span><text:span text:style-name="T12"> is </text:span><text:span text:style-name="T13">a small and r</text:span><text:span text:style-name="T12">eliable 4G LTE USB </text:span><text:span text:style-name="T13">m</text:span><text:span text:style-name="T12">odem </text:span><text:span text:style-name="T14">board </text:span><text:span text:style-name="T13">with </text:span><text:span text:style-name="T12">Quectel EG800K-EU </text:span><text:span text:style-name="T13">module.</text:span><text:span text:style-name="T12"> </text:span><text:span text:style-name="T13">It </text:span><text:span text:style-name="T12">delivers reliable, cost-effective, and energy-efficient cellular connectivity for IoT, M2M, industrial automation, telemetry, POS terminals, remote monitoring, and embedded systems.</text:span><text:bookmark-end text:name="__RefHeading___Toc2489_3915701551"/></text:p>
      <text:p text:style-name="P11"><text:span text:style-name="T15">The </text:span><text:span text:style-name="T12">LTE speed </text:span><text:span text:style-name="T15">is </text:span><text:span text:style-name="T16">10</text:span><text:span text:style-name="T12">Mbps downlink and 5Mbps uplink, </text:span><text:span text:style-name="T15">but is b</text:span><text:span text:style-name="T12">ackward-compatible with existing EDGE and GSM/GPRS networks. </text:span><text:span text:style-name="T15">This allows USB-</text:span><text:span text:style-name="T16">LTE4G-EU</text:span><text:span text:style-name="T15"> to connect to any existing 2G, 3G and 4G network.</text:span></text:p>
      <text:p text:style-name="P12"><text:span text:style-name="T15">T</text:span><text:span text:style-name="T12">he board has </text:span><text:span text:style-name="T14">USB type C connector </text:span><text:span text:style-name="T17">for powering and data connection. The design </text:span><text:span text:style-name="T14">also </text:span><text:span text:style-name="T17">has</text:span><text:span text:style-name="T14"> EXT1 header which can be used for powering or data access </text:span><text:span text:style-name="T17">when embedding in own products or testing</text:span><text:span text:style-name="T14">.</text:span></text:p>
      <text:p text:style-name="P13"><text:bookmark-start text:name="__RefHeading___Toc2489_39157015511"/><text:span text:style-name="Strong_20_Emphasis"><text:span text:style-name="T18">USB-LTE4G-EU</text:span></text:span><text:span text:style-name="T15"> will w</text:span><text:span text:style-name="T12">ork with </text:span><text:span text:style-name="T19">Olimex</text:span><text:span text:style-name="T12"> OSHW Linux </text:span><text:span text:style-name="T19">c</text:span><text:span text:style-name="T12">omputers, Beaglebone and Raspberry Pi </text:span><text:span text:style-name="T15">and any other PC running Windows, Linux, or Android</text:span><text:span text:style-name="T12">.</text:span><text:bookmark-end text:name="__RefHeading___Toc2489_39157015511"/></text:p>
      <text:h text:style-name="P14" text:outline-level="2"/>
      <text:h text:style-name="P15" text:outline-level="2"><text:bookmark-start text:name="__RefHeading___Toc765_467717262"/>1.2. Board features <text:bookmark-end text:name="__RefHeading___Toc765_467717262"/></text:h>
      <text:p text:style-name="P10"/>
      <text:list text:style-name="L1">
        <text:list-item>
          <text:p text:style-name="P16"><text:span text:style-name="T12">Quectel EG800K-EU LTE module </text:span><text:span text:style-name="T20">with the following features:</text:span></text:p>
          <text:list>
            <text:list-item>
              <text:p text:style-name="P17">LTE Cat 1 bis technology</text:p>
            </text:list-item>
            <text:list-item>
              <text:p text:style-name="P17">Download speeds up to 10 Mbps</text:p>
            </text:list-item>
            <text:list-item>
              <text:p text:style-name="P18">Upload speeds up to 5 Mbps</text:p>
            </text:list-item>
            <text:list-item>
              <text:p text:style-name="P17">Frequency bands EU: B1/B3/B5/B7/B8/B20/B28</text:p>
            </text:list-item>
            <text:list-item>
              <text:p text:style-name="P17">AT commands: Complies with 3GPP TS 27.007 and 3GPP TS 27.005</text:p>
            </text:list-item>
            <text:list-item>
              <text:p text:style-name="P17">Supports 3GPP Rel-13 Cat 1 bis FDD</text:p>
            </text:list-item>
            <text:list-item>
              <text:p text:style-name="P17">Supports UL QPSK and 16QAM modulations</text:p>
            </text:list-item>
            <text:list-item>
              <text:p text:style-name="P17">Supports DL QPSK, 16QAM and 64QAM modulations</text:p>
            </text:list-item>
            <text:list-item>
              <text:p text:style-name="P17">Supports 1.4/3/5/10/15/20 MHz RF bandwidths</text:p>
            </text:list-item>
          </text:list>
        </text:list-item>
        <text:list-item>
          <text:p text:style-name="P16"><text:span text:style-name="T12">USB-C connector with USB 2.0 interface for power and </text:span><text:span text:style-name="T20">serial </text:span><text:span text:style-name="T12">communication</text:span></text:p>
        </text:list-item>
        <text:list-item>
          <text:p text:style-name="P19">Nano SIM holder</text:p>
        </text:list-item>
        <text:list-item>
          <text:p text:style-name="P16"><text:span text:style-name="T12">Auto</text:span><text:span text:style-name="T20">matic module turn on circuit upon</text:span><text:span text:style-name="T12"> power </text:span><text:span text:style-name="T20">up</text:span></text:p>
        </text:list-item>
      </text:list>
      <text:list text:style-name="L2">
        <text:list-item>
          <text:p text:style-name="P20"><text:span text:style-name="T12">EXT1 header </text:span><text:span text:style-name="T21">for external power supply </text:span><text:span text:style-name="T22">input</text:span><text:span text:style-name="T21">, main UART with </text:span><text:span text:style-name="T22">RX, TX, and </text:span><text:span text:style-name="T21">DTR, </text:span><text:span text:style-name="T22">module </text:span><text:span text:style-name="T21">reset </text:span><text:span text:style-name="T22">pin</text:span><text:span text:style-name="T21">, module </text:span><text:span text:style-name="T22">turn on-off pin, power out</text:span></text:p>
        </text:list-item>
        <text:list-item>
          <text:p text:style-name="P21">Two status LEDs</text:p>
        </text:list-item>
        <text:list-item>
          <text:p text:style-name="P21">U.FL connector for GSM antenna</text:p>
        </text:list-item>
        <text:list-item>
          <text:p text:style-name="P20"><text:span text:style-name="T12">Three </text:span><text:span text:style-name="T21">grounded metallized mounting holes</text:span></text:p>
        </text:list-item>
        <text:list-item>
          <text:p text:style-name="P22"><text:span text:style-name="T20">Current c</text:span><text:span text:style-name="T12">onsumption: 20μA @Power off, 3mA @Sleep, 22mA @Idle, 50-350mA when active, up to 2A burst consumption</text:span></text:p>
        </text:list-item>
        <text:list-item>
          <text:p text:style-name="P21">Operating temperature range: -35+75C</text:p>
        </text:list-item>
        <text:list-item>
          <text:p text:style-name="P23">Industrial-grade reliability</text:p>
        </text:list-item>
        <text:list-item>
          <text:p text:style-name="P24">Support for Windows, Linux, and Android platforms</text:p>
        </text:list-item>
        <text:list-item>
          <text:p text:style-name="P21">Dimensions: (34 x 25 x 6)mm</text:p>
        </text:list-item>
      </text:list>
      <text:p text:style-name="P10"><text:bookmark text:name="__RefHeading___Toc2487_3915701551 Copy 1"/></text:p>
      <text:h text:style-name="P15" text:outline-level="2"><text:bookmark-start text:name="__RefHeading___Toc2406_360447580"/><text:span text:style-name="T9">1.3. </text:span>USB-<text:span text:style-name="T6">LTE4G-EU</text:span> ordering options<text:bookmark-end text:name="__RefHeading___Toc2406_360447580"/></text:h>
      <text:p text:style-name="Standard"/>
      <text:p text:style-name="P25">It is recommended to start with<text:span text:style-name="T23"> the</text:span> <text:a xlink:type="simple" xlink:href="https://www.olimex.com/Products/IoT/LTE/USB-LTE4G-EU-ANT/" text:style-name="Internet_20_link" text:visited-style-name="Visited_20_Internet_20_Link">USB-LTE4G-EU-ANT</text:a><text:span text:style-name="T5"> </text:span>version.</text:p>
      <text:p text:style-name="Standard"/>
      <text:p text:style-name="Text_20_body"><text:bookmark-start text:name="__RefHeading___Toc2497_3915701551"/><text:span text:style-name="T5">USB-</text:span><text:span text:style-name="T6">LTE4G-EU</text:span><text:span text:style-name="T5"> can be ordered </text:span><text:span text:style-name="T23">with our without antenna</text:span>:<text:bookmark-end text:name="__RefHeading___Toc2497_3915701551"/></text:p>
      <text:list text:style-name="L3">
        <text:list-item>
          <text:p text:style-name="P26"><text:a xlink:type="simple" xlink:href="https://www.olimex.com/Products/IoT/LTE/USB-LTE4G-EU-ANT/" text:style-name="Internet_20_link" text:visited-style-name="Visited_20_Internet_20_Link">USB-LTE4G-EU-ANT</text:a><text:span text:style-name="T5"> the module with GSM multiband antenna</text:span></text:p>
        </text:list-item>
        <text:list-item>
          <text:p text:style-name="P27"><text:a xlink:type="simple" xlink:href="https://www.olimex.com/Products/IoT/LTE/USB-LTE4G-EU/" text:style-name="Internet_20_link" text:visited-style-name="Visited_20_Internet_20_Link"><text:bookmark-start text:name="__RefHeading___Toc2499_3915701551"/><text:span text:style-name="T5">USB-</text:span><text:span text:style-name="T6">LTE4G-EU</text:span></text:a><text:span text:style-name="T5"> just the module </text:span><text:span text:style-name="T24">without u.FL GSM antenna</text:span><text:bookmark-end text:name="__RefHeading___Toc2499_3915701551"/></text:p>
        </text:list-item>
      </text:list>
      <text:p text:style-name="P28"><text:tab/>We can manufacture <text:span text:style-name="T24">NA version upon request but the NA version of the module is significantly <text:tab/>more expensive.</text:span></text:p>
      <text:p text:style-name="P29"><text:span text:style-name="T25">There is</text:span><text:span text:style-name="T24"> a custom 3D printed plastic box </text:span><text:span text:style-name="T25">available</text:span><text:span text:style-name="T24"> for the module. </text:span><text:span text:style-name="T25">It </text:span><text:span text:style-name="T24">can be purchased separately:</text:span></text:p>
      <text:list text:continue-numbering="true" text:style-name="L3">
        <text:list-item>
          <text:p text:style-name="P30"><text:a xlink:type="simple" xlink:href="https://www.olimex.com/Products/IoT/LTE/BOX-LTE4G/" text:style-name="Internet_20_link" text:visited-style-name="Visited_20_Internet_20_Link">BOX-USB-LTE4G</text:a> – <text:span text:style-name="T24">keeps the antenna and the module safe, only USB type C connector exposed.</text:span></text:p>
        </text:list-item>
      </text:list>
      <text:p text:style-name="P31">Cables and extras:</text:p>
      <text:list text:style-name="L4">
        <text:list-item>
          <text:p text:style-name="P32"><text:a xlink:type="simple" xlink:href="https://www.olimex.com/Products/Components/Cables/USB/USB-CABLE-A-TO-C-15CM/" text:style-name="Internet_20_link" text:visited-style-name="Visited_20_Internet_20_Link">USB-CABLE-A-TO-C-15CM</text:a> – short USB type C to type A connector to reduce chances for high capacitance; 4G modules have <text:span text:style-name="T26">up to 2A burst current consumption</text:span></text:p>
        </text:list-item>
        <text:list-item>
          <text:p text:style-name="P33"><text:a xlink:type="simple" xlink:href="https://www.olimex.com/Products/USB-Modules/USB-CAP/" text:style-name="Internet_20_link" text:visited-style-name="Visited_20_Internet_20_Link">USB-CAP</text:a> - USB supply filtering to enable the operation of current-hungry devices with weak USB hosts</text:p>
        </text:list-item>
        <text:list-item>
          <text:p text:style-name="P34"><text:a xlink:type="simple" xlink:href="https://www.olimex.com/Products/USB-Modules/Interfaces/USB-SERIAL-L/" text:style-name="Internet_20_link" text:visited-style-name="Visited_20_Internet_20_Link">USB-SERIAL-L</text:a> – this is a USB-serial converter compatible with 1.8V UART levels if you decide to use the EXT1 header <text:span text:style-name="T27">for the majn UART</text:span>, requires connecting <text:span text:style-name="T27">VREF to VDD_EXT</text:span></text:p>
        </text:list-item>
      </text:list>
      <text:p text:style-name="P35"/>
      <text:p text:style-name="P35"/>
      <text:p text:style-name="P35"/>
      <text:h text:style-name="P36" text:outline-level="2"><text:bookmark-start text:name="__RefHeading___Toc2406_360447580 Copy 1"/><text:span text:style-name="T9">1.</text:span><text:span text:style-name="T26">4</text:span><text:span text:style-name="T9">. </text:span><text:span text:style-name="T26">License information</text:span><text:bookmark-end text:name="__RefHeading___Toc2406_360447580 Copy 1"/></text:h>
      <text:p text:style-name="P37">USB-LTE4G-EU <text:span text:style-name="T28">and USB-LTE4G-EU-ANT</text:span> <text:span text:style-name="T28">are propriety designs. They are</text:span> <text:span text:style-name="T29">NOT </text:span>considered OSHW (Open-source HardWare) and design files and schematics will <text:span text:style-name="T28">NOT</text:span> be shared.</text:p>
      <text:p text:style-name="P38">This document is considered OSHW and it is made with LibreOffice, you are free to edit it to your liking as long as you respect the copyright of our trade marks.</text:p>
      <text:h text:style-name="P39" text:outline-level="1"><text:bookmark-start text:name="__RefHeading___Toc890_467717262"/><text:span text:style-name="T30">2</text:span>. Quick start up<text:bookmark-end text:name="__RefHeading___Toc890_467717262"/></text:h>
      <text:h text:style-name="P40" text:outline-level="2"><text:bookmark-start text:name="__RefHeading___Toc2408_360447580 Copy 1"/><text:span text:style-name="T30">2</text:span><text:span text:style-name="T24">.1. Hardware connection</text:span><text:bookmark-end text:name="__RefHeading___Toc2408_360447580 Copy 1"/></text:h>
      <text:p text:style-name="P41">The minimum hardware connection is pretty simple:</text:p>
      <text:p text:style-name="P41">- Attach the antenna to the USB-LTE4G-EU’<text:span text:style-name="T31">s</text:span> u.FL connector, make sure it clicks and stays firm<text:span text:style-name="T31">ly</text:span> <text:span text:style-name="T31">attached, you can rotate it the way you like;</text:span></text:p>
      <text:p text:style-name="P41">- Insert nano SIM card at the back of the board, pay attention to the direction and use pliers or similar tool to make sure it is inserted in place; for absolute beginner maybe remove the PIN from the SIM card using regular GSM device first;</text:p>
      <text:p text:style-name="P41">- <text:span text:style-name="T31">(Optional) If you also purchased the BOX-LTE4G, now is good time to also put the board in the box, refer to 2.3. for details</text:span></text:p>
      <text:p text:style-name="P41">- Attach use USB type C connector to attach an USB cable between the board and a computer.</text:p>
      <text:h text:style-name="Heading_20_2" text:outline-level="2"><text:bookmark-start text:name="__RefHeading___Toc2408_360447580"/><text:span text:style-name="T30">2</text:span><text:span text:style-name="T24">.2. </text:span>USB-LTE4G-EU software installation<text:bookmark-end text:name="__RefHeading___Toc2408_360447580"/></text:h>
      <text:p text:style-name="P42">After attaching the USB, the board should create a few entries in the devices attached to your computer. The most interface <text:span text:style-name="T32">you are interested in is the one where you can send AT commands, it </text:span>is the “Mobile AT Interface (Interface 3)”. <text:span text:style-name="T33">After identifying the port, start serial terminal on it at 115200 baud. Now you should be able to send AT commands and receive replies. Type “AT” without the quotes and see if you get reply “OK”.</text:span></text:p>
      <text:p text:style-name="P43"><text:span text:style-name="T32">If you don’t see it properly or there are errors, try to install serial drivers with an open source tool like Zadig. Make sure to list all options and install </text:span></text:p>
      <text:p text:style-name="P43"/>
      <text:p text:style-name="P44">This is how it looks under Windows:</text:p>
      <text:p text:style-name="P44"><draw:frame draw:style-name="fr3" draw:name="Image6" text:anchor-type="char" svg:width="3.8091in" style:rel-width="55%" svg:height="0.9929in" style:rel-height="11%" draw:z-index="27"><draw:image xlink:href="Pictures/100000010000016E0000005C95F72537.png" xlink:type="simple" xlink:show="embed" xlink:actuate="onLoad" draw:mime-type="image/png"/></draw:frame></text:p>
      <text:h text:style-name="Heading_20_2" text:outline-level="2" text:is-list-header="true"><text:bookmark-start text:name="__RefHeading___Toc1308_203368328"/>2.3. BOX-LTE4G assembly <text:bookmark-end text:name="__RefHeading___Toc1308_203368328"/></text:h>
      <text:p text:style-name="P45"/>
      <text:h text:style-name="P46" text:outline-level="1"><text:bookmark-start text:name="__RefHeading___Toc2552_3587637980"/><text:soft-page-break/><text:span text:style-name="T30">3</text:span><text:span text:style-name="T24">. Hardware </text:span><text:bookmark-end text:name="__RefHeading___Toc2552_3587637980"/></text:h>
      <text:h text:style-name="Heading_20_2" text:outline-level="2"><text:bookmark-start text:name="__RefHeading___Toc892_467717262"/><text:span text:style-name="T30">3</text:span>.1. USB-LTE4G-EU top layout<text:bookmark-end text:name="__RefHeading___Toc892_467717262"/></text:h>
      <text:p text:style-name="P47"/>
      <text:p text:style-name="P48"><draw:frame text:anchor-type="paragraph" draw:z-index="4" draw:name="Shape16" draw:style-name="gr1" draw:text-style-name="P49" svg:width="1.0295in" svg:height="0.3843in" svg:x="3.6437in" svg:y="0.1252in"><draw:text-box><text:p>ModStat1 green LED</text:p></draw:text-box></draw:frame><draw:frame text:anchor-type="paragraph" draw:z-index="7" draw:name="Shape20" draw:style-name="gr2" draw:text-style-name="P49" svg:width="1.0421in" svg:height="0.4087in" svg:x="2.0701in" svg:y="0.0783in"><draw:text-box><text:p>NetStat1 yellow LED</text:p></draw:text-box></draw:frame><draw:frame text:anchor-type="paragraph" draw:z-index="2" draw:name="Shape14" draw:style-name="gr3" draw:text-style-name="P49" svg:width="1.8787in" svg:height="0.5571in" svg:x="5.1516in" svg:y="0.0929in"><draw:text-box><text:p>u.FL antenna connector; GSM antenna is mandatory</text:p></draw:text-box></draw:frame></text:p>
      <text:p text:style-name="P50"><draw:frame draw:style-name="fr4" draw:name="Image3" text:anchor-type="paragraph" svg:x="2.0327in" svg:y="0.611in" svg:width="3.4626in" style:rel-width="50%" svg:height="4.6028in" style:rel-height="51%" draw:z-index="13"><draw:image xlink:href="Pictures/1000000100000305000004096E85C99C.png" xlink:type="simple" xlink:show="embed" xlink:actuate="onLoad" draw:mime-type="image/png"/></draw:frame><draw:line text:anchor-type="paragraph" draw:z-index="18" draw:name="Shape3" draw:style-name="gr4" draw:text-style-name="P51" svg:x1="5.2181in" svg:y1="3.061in" svg:x2="6.0516in" svg:y2="2.6555in"><text:p/></draw:line><draw:line text:anchor-type="paragraph" draw:z-index="1" draw:name="Shape2" draw:style-name="gr5" draw:text-style-name="P51" svg:x1="3.6618in" svg:y1="1.6685in" svg:x2="3.9339in" svg:y2="1.3177in"><text:p/></draw:line><draw:line text:anchor-type="paragraph" draw:z-index="20" draw:name="Shape4" draw:style-name="gr6" draw:text-style-name="P51" svg:x1="3.7154in" svg:y1="4.8043in" svg:x2="4.0787in" svg:y2="5.576in"><text:p/></draw:line><draw:line text:anchor-type="paragraph" draw:z-index="24" draw:name="Shape6" draw:style-name="gr6" draw:text-style-name="P51" svg:x1="3.0083in" svg:y1="3.2874in" svg:x2="1.3965in" svg:y2="4.1in"><text:p/></draw:line><draw:line text:anchor-type="paragraph" draw:z-index="22" draw:name="Shape8" draw:style-name="gr6" draw:text-style-name="P51" svg:x1="4.061in" svg:y1="0.2543in" svg:x2="3.3839in" svg:y2="0.9406in"><text:p/></draw:line><draw:line text:anchor-type="paragraph" draw:z-index="23" draw:name="Shape9" draw:style-name="gr6" draw:text-style-name="P51" svg:x1="2.2902in" svg:y1="2.8846in" svg:x2="1.3756in" svg:y2="3.2799in"><text:p/></draw:line><draw:frame text:anchor-type="paragraph" draw:z-index="5" draw:name="Shape18" draw:style-name="gr7" draw:text-style-name="P49" svg:width="0.9768in" svg:height="0.3843in" svg:x="3.8083in" svg:y="5.6457in"><draw:text-box><text:p>USB type C</text:p></draw:text-box></draw:frame><draw:frame text:anchor-type="paragraph" draw:z-index="6" draw:name="Shape19" draw:style-name="gr8" draw:text-style-name="P49" svg:width="1.5016in" svg:height="0.6067in" svg:x="0.3118in" svg:y="2.8846in"><draw:text-box><text:p>DFU1 PTH jumper (default open)</text:p></draw:text-box></draw:frame><draw:frame text:anchor-type="paragraph" draw:z-index="3" draw:name="Shape15" draw:style-name="gr9" draw:text-style-name="P49" svg:width="0.9323in" svg:height="0.2921in" svg:x="5.6665in" svg:y="2.3638in"><draw:text-box><text:p>EXT1 header</text:p></draw:text-box></draw:frame><draw:line text:anchor-type="paragraph" draw:z-index="19" draw:name="Shape1" draw:style-name="gr10" draw:text-style-name="P51" svg:x1="4.9563in" svg:y1="0.9925in" svg:x2="5.8146in" svg:y2="0.2807in"><text:p/></draw:line><draw:line text:anchor-type="paragraph" draw:z-index="21" draw:name="Shape10" draw:style-name="gr6" draw:text-style-name="P51" svg:x1="3.1118in" svg:y1="0.9079in" svg:x2="2.5563in" svg:y2="0.2134in"><text:p/></draw:line><draw:frame text:anchor-type="paragraph" draw:z-index="25" draw:name="Shape 1" draw:style-name="gr7" draw:text-style-name="P49" svg:width="1.1335in" svg:height="0.3843in" svg:x="0.4272in" svg:y="3.9256in"><draw:text-box><text:p>Main module EG800K-EU</text:p></draw:text-box></draw:frame><draw:frame text:anchor-type="paragraph" draw:z-index="11" draw:name="Shape25" draw:style-name="gr11" draw:text-style-name="P49" svg:width="4.4976in" svg:height="1.1512in" svg:x="0.2965in" svg:y="5.9083in"><draw:text-box><text:p>Yellow LED NetStat1: </text:p><text:p>- Blink slowly (200ms High/1800ms Low) - search network</text:p><text:p>- Blink slowly (1800ms High/200ms Low) – idle</text:p><text:p>- Blink quickly (125ms High/125ms Low) – data transfer</text:p><text:p>Green LED ModStat1:<text:line-break/>- On – module is turned on</text:p></draw:text-box></draw:frame></text:p>
      <text:h text:style-name="P52" text:outline-level="2" text:is-list-header="true"><text:bookmark-start text:name="__RefHeading___Toc894_467717262"/><text:span text:style-name="T30">3</text:span>.2. USB-LTE4G-EU <text:span text:style-name="T30">bottom</text:span> layout<text:bookmark-end text:name="__RefHeading___Toc894_467717262"/></text:h>
      <text:p text:style-name="P53"><draw:frame draw:style-name="fr4" draw:name="Image4" text:anchor-type="paragraph" svg:x="1.6681in" svg:y="0.5882in" svg:width="3.4626in" style:rel-width="50%" svg:height="4.6028in" style:rel-height="51%" draw:z-index="14"><draw:image xlink:href="Pictures/10000001000002FF0000040671E81F16.png" xlink:type="simple" xlink:show="embed" xlink:actuate="onLoad" draw:mime-type="image/png"/></draw:frame><draw:line text:anchor-type="paragraph" draw:z-index="15" draw:name="Shape11" draw:style-name="gr12" draw:text-style-name="P54" svg:x1="4.0555in" svg:y1="2.8154in" svg:x2="5.8154in" svg:y2="1.8063in"><text:p/></draw:line><draw:frame text:anchor-type="paragraph" draw:z-index="8" draw:name="Shape21" draw:style-name="gr13" draw:text-style-name="P49" svg:width="1.0161in" svg:height="0.2606in" svg:x="5.5571in" svg:y="1.5457in"><draw:text-box><text:p>Nano SIM</text:p></draw:text-box></draw:frame><draw:line text:anchor-type="paragraph" draw:z-index="17" draw:name="Shape12" draw:style-name="gr6" draw:text-style-name="P51" svg:x1="2.1909in" svg:y1="4.6559in" svg:x2="0.8154in" svg:y2="4.1807in"><text:p/></draw:line><draw:frame text:anchor-type="paragraph" draw:z-index="10" draw:name="Shape23" draw:style-name="gr14" draw:text-style-name="P49" svg:width="1.0642in" svg:height="0.687in" svg:x="0.0516in" svg:y="3.8882in"><draw:text-box><text:p>Mount hole D=3.3mm</text:p></draw:text-box></draw:frame><draw:line text:anchor-type="paragraph" draw:z-index="16" draw:name="Shape13" draw:style-name="gr6" draw:text-style-name="P51" svg:x1="0.7457in" svg:y1="2.5138in" svg:x2="1.8677in" svg:y2="2.85in"><text:p/></draw:line><draw:frame text:anchor-type="paragraph" draw:z-index="9" draw:name="Shape22" draw:style-name="gr15" draw:text-style-name="P49" svg:width="0.8335in" svg:height="0.378in" svg:x="0.2508in" svg:y="2.1937in"><draw:text-box><text:p>EXT1</text:p></draw:text-box></draw:frame></text:p>
      <text:h text:style-name="P52" text:outline-level="2" text:is-list-header="true"><text:bookmark-start text:name="__RefHeading___Toc896_467717262"/><text:span text:style-name="T30">3</text:span>.<text:span text:style-name="T30">3</text:span>. <text:span text:style-name="T30">EXT1 header</text:span><text:bookmark-end text:name="__RefHeading___Toc896_467717262"/></text:h>
      <text:p text:style-name="P55">The name of the signal of each pin of the header is printed next to it at the bottom of the board. <text:span text:style-name="T34">You can find power in/out, GND, main UART, reset and power pins of the module and VDD_EXT that is 1.8V output (50mA max) or 1.8V VREF.</text:span></text:p>
      <text:p text:style-name="P55"><draw:frame draw:style-name="fr5" draw:name="Image5" text:anchor-type="paragraph" svg:width="5.1937in" style:rel-width="75%" svg:height="5.2346in" style:rel-height="58%" draw:z-index="26"><draw:image xlink:href="Pictures/10000001000002D0000002E0D0A8A83F.png" xlink:type="simple" xlink:show="embed" xlink:actuate="onLoad" draw:mime-type="image/png"/></draw:frame></text:p>
      <text:p text:style-name="P56">Never apply external power supply at EXT1 header and USB at the same time! This will lead to immediate short-circuit and hardware damage!</text:p>
      <text:p text:style-name="P57">Notice the board has no voltage level shifters on the data lines! Make sure your serial connection <text:span text:style-name="T35">works at 1.8V (usually data lines of the serial are at 3.3V or 5V and this will lead to hardware damage!).</text:span></text:p>
      <text:p text:style-name="P57"/>
      <text:p text:style-name="P58">Consider using Olimex USB-SERIAL-L, remember to first connect Vref to VDD_EXT at EXT1 of USB-LTE4G so that USB-SERIAL-L buffers get set to 1.8V.</text:p>
      <text:h text:style-name="Heading_20_2" text:outline-level="2"><text:bookmark-start text:name="__RefHeading___Toc898_467717262"/><text:soft-page-break/><text:span text:style-name="T30">3</text:span>.4. LEDs<text:bookmark-end text:name="__RefHeading___Toc898_467717262"/></text:h>
      <text:p text:style-name="P59"><text:span text:style-name="T36">The board has two status LEDs:</text:span></text:p>
      <text:p text:style-name="P59"><text:span text:style-name="T36"/></text:p>
      <text:p text:style-name="Standard"><text:span text:style-name="T37">- NetStat1 – </text:span><text:span text:style-name="T36">yellow color – shows the network status</text:span><text:span text:style-name="T37">:</text:span></text:p>
      <text:p text:style-name="Standard"><text:span text:style-name="T37"/></text:p>
      <text:list text:style-name="L5">
        <text:list-item>
          <text:p text:style-name="P60"><text:span text:style-name="T37">Blink slowly (200ms High/1800ms Low) - search network</text:span></text:p>
        </text:list-item>
        <text:list-item>
          <text:p text:style-name="P60"><text:span text:style-name="T37">Blink slowly (1800ms High/200ms Low) – idle</text:span></text:p>
        </text:list-item>
        <text:list-item>
          <text:p text:style-name="P60"><text:span text:style-name="T37">Blink quickly (125ms High/125ms Low) – data transfer</text:span></text:p>
        </text:list-item>
      </text:list>
      <text:p text:style-name="Standard"><text:span text:style-name="T37"/></text:p>
      <text:p text:style-name="Standard"><text:span text:style-name="T37">- ModStat1 – </text:span><text:span text:style-name="T36">green color – shows the EG800K-EU module status when it is o</text:span>n – <text:span text:style-name="T38">the </text:span>module is turned on <text:span text:style-name="T38">normally.</text:span></text:p>
      <text:h text:style-name="Heading_20_2" text:outline-level="2"><text:bookmark-start text:name="__RefHeading___Toc900_467717262"/><text:span text:style-name="T30">3</text:span>.5. DFU1 PTH jumper<text:bookmark-end text:name="__RefHeading___Toc900_467717262"/></text:h>
      <text:p text:style-name="P61">This jumper is open by default. Close the jumper (e.g. solder the pads together) to enter firmware upgrade mode. </text:p>
      <text:p text:style-name="Text_20_body">Pulling down USB_BOOT to GND before turning on the module, and then the module will enter forced download mode. In this mode, the module supports firmware upgrade over USB 2.0 interface.</text:p>
      <text:p text:style-name="P61">Remember to unsolder the </text:p>
      <text:h text:style-name="P14" text:outline-level="2"/>
      <text:h text:style-name="P15" text:outline-level="2"><text:bookmark-start text:name="__RefHeading___Toc1310_203368328"/>3.6. USB-LTE4G-EU board dimensions<text:bookmark-end text:name="__RefHeading___Toc1310_203368328"/></text:h>
      <text:h text:style-name="Heading_20_2" text:outline-level="2" text:is-list-header="true"><draw:frame draw:style-name="fr6" draw:name="Image7" text:anchor-type="paragraph" svg:width="5.1937in" style:rel-width="75%" svg:height="5.5055in" style:rel-height="61%" draw:z-index="28"><draw:image xlink:href="Pictures/10000001000003090000033DC99E538B.png" xlink:type="simple" xlink:show="embed" xlink:actuate="onLoad" draw:mime-type="image/png"/></draw:frame><text:bookmark-start text:name="__RefHeading___Toc1408_203368328"/>3.7. BOX-LTE4G <text:span text:style-name="T34">dimensions</text:span><text:bookmark-end text:name="__RefHeading___Toc1408_203368328"/></text:h>
      <text:h text:style-name="P15" text:outline-level="2"><text:bookmark-start text:name="__RefHeading___Toc2476_3915701551"/><text:span text:style-name="T26">3.</text:span><text:span text:style-name="T39">8</text:span><text:span text:style-name="T26">. </text:span>USB-<text:span text:style-name="T6">LTE4G-EU</text:span> power consumption<text:bookmark-end text:name="__RefHeading___Toc2476_3915701551"/></text:h>
      <text:p text:style-name="P62"><text:span text:style-name="T40">Warning! The 4G modem, like most modems has up to 2A transmission burst current consumption!</text:span> </text:p>
      <text:p text:style-name="P62">Make sure that your USB port and cable can handle it. <text:span text:style-name="T41">Consider using shorter USB-cable and maybe USB-CAP. If it is still shaky during some commands – consider external power supply (but never connect external power supply and USB at the same time!)</text:span></text:p>
      <text:list text:style-name="L6">
        <text:list-item>
          <text:p text:style-name="P63">0.2A @ Active operation</text:p>
        </text:list-item>
        <text:list-item>
          <text:p text:style-name="P63">22mA @ Idle</text:p>
        </text:list-item>
        <text:list-item>
          <text:p text:style-name="P63">3mA @ Sleep</text:p>
        </text:list-item>
        <text:list-item>
          <text:p text:style-name="P63">20uA @ Power off</text:p>
        </text:list-item>
      </text:list>
      <text:h text:style-name="P64" text:outline-level="1"><text:bookmark-start text:name="__RefHeading___Toc1025_467717262"/><text:span text:style-name="T42">4. Software</text:span><text:bookmark-end text:name="__RefHeading___Toc1025_467717262"/></text:h>
      <text:h text:style-name="Heading_20_1" text:outline-level="1"><text:bookmark-start text:name="__RefHeading___Toc1135_467717262"/>5. <text:span text:style-name="T43">Additional d</text:span>ocuments<text:bookmark-end text:name="__RefHeading___Toc1135_467717262"/></text:h>
      <text:h text:style-name="Heading_20_1" text:outline-level="1"><text:bookmark-start text:name="__RefHeading___Toc1027_467717262"/><text:span text:style-name="T44">6</text:span>. Warranty and returns<text:bookmark-end text:name="__RefHeading___Toc1027_467717262"/></text:h>
      <text:h text:style-name="P46" text:outline-level="1"><text:bookmark-start text:name="__RefHeading___Toc2484_3915701551"/><text:span text:style-name="T44">7</text:span><text:span text:style-name="T42">. </text:span><text:span text:style-name="T4">Document r</text:span>evision <text:span text:style-name="T4">h</text:span>istory<text:bookmark-end text:name="__RefHeading___Toc2484_3915701551"/></text:h>
      <text:p text:style-name="P65">Revision 1.0 <text:span text:style-name="T4">June</text:span> 20<text:span text:style-name="T7">2</text:span><text:span text:style-name="T4">6</text:span></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in" fo:margin-bottom="0.1in" style:contextual-spacing="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2in"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6-06-04T16:47:29.508000000</dc:date>
    <meta:editing-duration>P1DT18H55M6S</meta:editing-duration>
    <meta:editing-cycles>138</meta:editing-cycles>
    <meta:generator>LibreOffice/24.8.0.3$Windows_X86_64 LibreOffice_project/0bdf1299c94fe897b119f97f3c613e9dca6be583</meta:generator>
    <meta:print-date>2026-06-04T16:47:00.664000000</meta:print-date>
    <meta:printed-by>PDF files</meta:printed-by>
    <meta:document-statistic meta:table-count="1" meta:image-count="7" meta:object-count="0" meta:page-count="14" meta:paragraph-count="117" meta:word-count="1252" meta:character-count="7346" meta:non-whitespace-character-count="6226"/>
  </office:meta>
</office:document-meta>
</file>