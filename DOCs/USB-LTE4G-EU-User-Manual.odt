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CC000007DA53DDF40E.jpg" manifest:media-type="image/jpeg"/>
  <manifest:file-entry manifest:full-path="Pictures/10000001000000F000000041313C435F.png" manifest:media-type="image/png"/>
  <manifest:file-entry manifest:full-path="Pictures/1000000100000305000004096E85C99C.png" manifest:media-type="image/png"/>
  <manifest:file-entry manifest:full-path="Pictures/1000000000000647000003419F90EB06.jpg" manifest:media-type="image/jpeg"/>
  <manifest:file-entry manifest:full-path="Pictures/10000000000007D0000007D0AD3DE681.jpg" manifest:media-type="image/jpeg"/>
  <manifest:file-entry manifest:full-path="Pictures/100000010000016E0000005C95F72537.png" manifest:media-type="image/png"/>
  <manifest:file-entry manifest:full-path="Pictures/10000001000001C6000001BCE549AE30.png" manifest:media-type="image/png"/>
  <manifest:file-entry manifest:full-path="Pictures/10000000000006C2000005E5153470E4.jpg" manifest:media-type="image/jpeg"/>
  <manifest:file-entry manifest:full-path="Pictures/10000000000007170000052F74076158.jpg" manifest:media-type="image/jpeg"/>
  <manifest:file-entry manifest:full-path="Pictures/10000001000002FF0000040671E81F16.png" manifest:media-type="image/png"/>
  <manifest:file-entry manifest:full-path="Pictures/10000001000002D0000002E0D0A8A83F.png" manifest:media-type="image/png"/>
  <manifest:file-entry manifest:full-path="Pictures/10000001000003090000033DC99E53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onsolas" svg:font-family="Consola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9118in" style:rel-column-width="37019*"/>
    </style:style>
    <style:style style:name="Table1.B" style:family="table-column">
      <style:table-column-properties style:column-width="3.0132in" style:rel-column-width="28516*"/>
    </style:style>
    <style:style style:name="Table1.A1" style:family="table-cell">
      <style:table-cell-properties fo:padding="0.0382in" fo:border="none"/>
    </style:style>
    <style:style style:name="P1" style:family="paragraph" style:parent-style-name="Text_20_body">
      <style:paragraph-properties fo:line-height="0.8465in"/>
      <style:text-properties officeooo:paragraph-rsid="00a0c4d1"/>
    </style:style>
    <style:style style:name="P2" style:family="paragraph" style:parent-style-name="Text_20_body">
      <style:paragraph-properties fo:line-height="0.8465in" fo:text-align="center" style:justify-single-word="false"/>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3"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6pt" fo:font-style="normal" fo:font-weight="normal" officeooo:rsid="002cb88f" officeooo:paragraph-rsid="00b5133e" fo:background-color="transparent" style:font-size-asian="16pt" style:font-style-asian="normal" style:font-weight-asian="normal" style:font-size-complex="16pt" style:font-style-complex="normal" style:font-weight-complex="normal"/>
    </style:style>
    <style:style style:name="P4" style:family="paragraph" style:parent-style-name="Text_20_body">
      <style:paragraph-properties fo:margin-top="0in" fo:margin-bottom="0in" style:contextual-spacing="false" fo:line-height="0.4583in" fo:text-align="end" style:justify-single-word="false"/>
      <style:text-properties style:use-window-font-color="true" loext:opacity="0%" style:font-name="Noto Sans CJK JP Bold" fo:font-size="16pt" fo:font-style="normal" fo:font-weight="normal" officeooo:rsid="002cb88f" officeooo:paragraph-rsid="00b5133e" fo:background-color="transparent" style:font-size-asian="16pt" style:font-style-asian="normal" style:font-weight-asian="normal" style:font-size-complex="16pt" style:font-style-complex="normal" style:font-weight-complex="normal"/>
    </style:style>
    <style:style style:name="P5" style:family="paragraph" style:parent-style-name="Text_20_body">
      <style:paragraph-properties fo:margin-top="0in" fo:margin-bottom="0in" style:contextual-spacing="false" fo:line-height="0.4583in" fo:text-align="end" style:justify-single-word="false"/>
      <style:text-properties style:use-window-font-color="true" loext:opacity="0%"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9252in" style:type="right" style:leader-style="dotted" style:leader-text="."/>
        </style:tab-stops>
      </style:paragraph-properties>
    </style:style>
    <style:style style:name="P8" style:family="paragraph" style:parent-style-name="Contents_20_3">
      <style:paragraph-properties>
        <style:tab-stops>
          <style:tab-stop style:position="6.9252in" style:type="right" style:leader-style="dotted" style:leader-text="."/>
        </style:tab-stops>
      </style:paragraph-properties>
    </style:style>
    <style:style style:name="P9" style:family="paragraph" style:parent-style-name="Heading_20_1" style:list-style-name=""/>
    <style:style style:name="P10" style:family="paragraph" style:parent-style-name="Heading_20_1" style:list-style-name="">
      <style:paragraph-properties fo:break-before="page"/>
      <style:text-properties officeooo:rsid="00b55a05" officeooo:paragraph-rsid="00b55a05"/>
    </style:style>
    <style:style style:name="P11" style:family="paragraph" style:parent-style-name="Text_20_body">
      <style:text-properties officeooo:paragraph-rsid="00a0c4d1"/>
    </style:style>
    <style:style style:name="P12" style:family="paragraph" style:parent-style-name="Text_20_body">
      <style:text-properties officeooo:paragraph-rsid="00b35c3d"/>
    </style:style>
    <style:style style:name="P13" style:family="paragraph" style:parent-style-name="Text_20_body">
      <style:text-properties officeooo:rsid="00b35c3d" officeooo:paragraph-rsid="00be8d24"/>
    </style:style>
    <style:style style:name="P14" style:family="paragraph" style:parent-style-name="Text_20_body">
      <style:text-properties officeooo:paragraph-rsid="00b30e5c"/>
    </style:style>
    <style:style style:name="P15" style:family="paragraph" style:parent-style-name="Heading_20_2">
      <style:paragraph-properties fo:break-before="page"/>
    </style:style>
    <style:style style:name="P16" style:family="paragraph" style:parent-style-name="Text_20_body" style:list-style-name="L1">
      <style:text-properties officeooo:paragraph-rsid="00bfb180"/>
    </style:style>
    <style:style style:name="P17" style:family="paragraph" style:parent-style-name="Text_20_body" style:list-style-name="L1">
      <style:text-properties fo:font-variant="normal" fo:text-transform="none" fo:color="#24292e" loext:opacity="100%" style:font-name="Liberation Serif1" fo:font-size="12pt" fo:letter-spacing="normal" fo:font-style="normal" fo:font-weight="normal" officeooo:paragraph-rsid="00bfb180"/>
    </style:style>
    <style:style style:name="P18" style:family="paragraph" style:parent-style-name="Text_20_body" style:list-style-name="L1">
      <style:text-properties fo:font-variant="normal" fo:text-transform="none" fo:color="#24292e" loext:opacity="100%" style:font-name="Liberation Serif1" fo:font-size="12pt" fo:letter-spacing="normal" fo:font-style="normal" fo:font-weight="normal" officeooo:paragraph-rsid="00a0c4d1"/>
    </style:style>
    <style:style style:name="P19" style:family="paragraph" style:parent-style-name="Text_20_body" style:list-style-name="L1">
      <style:text-properties fo:font-variant="normal" fo:text-transform="none" fo:color="#24292e" loext:opacity="100%" style:font-name="Liberation Serif1" fo:font-size="12pt" fo:letter-spacing="normal" fo:font-style="normal" fo:font-weight="normal" officeooo:paragraph-rsid="00c56891"/>
    </style:style>
    <style:style style:name="P20" style:family="paragraph" style:parent-style-name="Text_20_body" style:list-style-name="L2">
      <style:text-properties officeooo:rsid="00bfb180" officeooo:paragraph-rsid="00bfb180"/>
    </style:style>
    <style:style style:name="P21" style:family="paragraph" style:parent-style-name="Text_20_body" style:list-style-name="L2">
      <style:text-properties fo:font-variant="normal" fo:text-transform="none" fo:color="#24292e" loext:opacity="100%" style:font-name="Liberation Serif1" fo:font-size="12pt" fo:letter-spacing="normal" fo:font-style="normal" fo:font-weight="normal" officeooo:paragraph-rsid="00a0c4d1"/>
    </style:style>
    <style:style style:name="P22" style:family="paragraph" style:parent-style-name="Text_20_body" style:list-style-name="L2">
      <style:text-properties officeooo:paragraph-rsid="00bfb180"/>
    </style:style>
    <style:style style:name="P23" style:family="paragraph" style:parent-style-name="Text_20_body" style:list-style-name="L2">
      <style:text-properties fo:font-variant="normal" fo:text-transform="none" fo:color="#24292e" loext:opacity="100%" style:font-name="Liberation Serif1" fo:font-size="12pt" fo:letter-spacing="normal" fo:font-style="normal" fo:font-weight="normal" officeooo:paragraph-rsid="00c50710"/>
    </style:style>
    <style:style style:name="P24" style:family="paragraph" style:parent-style-name="Text_20_body" style:list-style-name="L2">
      <style:text-properties fo:font-variant="normal" fo:text-transform="none" fo:color="#24292e" loext:opacity="100%" style:font-name="Liberation Serif1" fo:font-size="12pt" fo:letter-spacing="normal" fo:font-style="normal" fo:font-weight="normal" officeooo:paragraph-rsid="00bfb180"/>
    </style:style>
    <style:style style:name="P25" style:family="paragraph" style:parent-style-name="Standard">
      <style:text-properties officeooo:rsid="00b603af" officeooo:paragraph-rsid="00b603af"/>
    </style:style>
    <style:style style:name="P26" style:family="paragraph" style:parent-style-name="Text_20_body" style:list-style-name="L3">
      <style:text-properties officeooo:paragraph-rsid="00b6451c"/>
    </style:style>
    <style:style style:name="P27" style:family="paragraph" style:parent-style-name="Text_20_body" style:list-style-name="L3"/>
    <style:style style:name="P28" style:family="paragraph" style:parent-style-name="Text_20_body">
      <style:text-properties fo:font-style="italic" officeooo:rsid="00b603af" officeooo:paragraph-rsid="00b80cbe" style:font-style-asian="italic" style:font-style-complex="italic"/>
    </style:style>
    <style:style style:name="P29" style:family="paragraph" style:parent-style-name="Text_20_body">
      <style:text-properties officeooo:paragraph-rsid="00b6451c"/>
    </style:style>
    <style:style style:name="P30" style:family="paragraph" style:parent-style-name="Text_20_body" style:list-style-name="L3">
      <style:text-properties officeooo:rsid="00b30e5c" officeooo:paragraph-rsid="00a0c4d1"/>
    </style:style>
    <style:style style:name="P31" style:family="paragraph" style:parent-style-name="Text_20_body">
      <style:text-properties officeooo:rsid="00b6451c" officeooo:paragraph-rsid="00b6451c"/>
    </style:style>
    <style:style style:name="P32" style:family="paragraph" style:parent-style-name="Text_20_body" style:list-style-name="L4">
      <style:text-properties officeooo:rsid="00b6451c" officeooo:paragraph-rsid="00b6451c"/>
    </style:style>
    <style:style style:name="P33" style:family="paragraph" style:parent-style-name="Text_20_body" style:list-style-name="L4">
      <style:text-properties officeooo:rsid="00b80cbe" officeooo:paragraph-rsid="00b80cbe"/>
    </style:style>
    <style:style style:name="P34" style:family="paragraph" style:parent-style-name="Text_20_body" style:list-style-name="L4">
      <style:text-properties officeooo:rsid="00c605c6" officeooo:paragraph-rsid="00c605c6"/>
    </style:style>
    <style:style style:name="P35" style:family="paragraph" style:parent-style-name="Heading_20_2">
      <style:text-properties officeooo:paragraph-rsid="00b80cbe"/>
    </style:style>
    <style:style style:name="P36" style:family="paragraph" style:parent-style-name="Text_20_body">
      <style:text-properties officeooo:rsid="00b80cbe" officeooo:paragraph-rsid="00b80cbe"/>
    </style:style>
    <style:style style:name="P37" style:family="paragraph" style:parent-style-name="Text_20_body">
      <style:text-properties officeooo:rsid="00b8c5f9" officeooo:paragraph-rsid="00ea8f8a"/>
    </style:style>
    <style:style style:name="P38" style:family="paragraph" style:parent-style-name="Heading_20_1">
      <style:paragraph-properties fo:break-before="page"/>
    </style:style>
    <style:style style:name="P39" style:family="paragraph" style:parent-style-name="Heading_20_2">
      <style:text-properties officeooo:paragraph-rsid="00b6451c"/>
    </style:style>
    <style:style style:name="P40" style:family="paragraph" style:parent-style-name="Text_20_body">
      <style:text-properties officeooo:rsid="00ca151c" officeooo:paragraph-rsid="00ca151c"/>
    </style:style>
    <style:style style:name="P41" style:family="paragraph" style:parent-style-name="Heading_20_2" style:list-style-name=""/>
    <style:style style:name="P42" style:family="paragraph" style:parent-style-name="Text_20_body">
      <style:text-properties officeooo:rsid="00cc6ffb" officeooo:paragraph-rsid="00e3c021"/>
    </style:style>
    <style:style style:name="P43" style:family="paragraph" style:parent-style-name="Heading_20_3">
      <style:text-properties fo:font-size="14pt" style:font-size-asian="14pt" style:font-size-complex="14pt"/>
    </style:style>
    <style:style style:name="P44" style:family="paragraph" style:parent-style-name="Text_20_body">
      <style:text-properties officeooo:paragraph-rsid="00e3c021"/>
    </style:style>
    <style:style style:name="P45" style:family="paragraph" style:parent-style-name="Standard">
      <style:text-properties officeooo:rsid="00cc6ffb" officeooo:paragraph-rsid="00e5253f"/>
    </style:style>
    <style:style style:name="P46" style:family="paragraph" style:parent-style-name="Standard">
      <style:text-properties officeooo:rsid="00cc6ffb" officeooo:paragraph-rsid="00edeb3a"/>
    </style:style>
    <style:style style:name="P47" style:family="paragraph" style:parent-style-name="Standard">
      <style:text-properties officeooo:rsid="00da0bd6" officeooo:paragraph-rsid="00edeb3a"/>
    </style:style>
    <style:style style:name="P48" style:family="paragraph" style:parent-style-name="Text_20_body">
      <style:text-properties officeooo:paragraph-rsid="00e5253f"/>
    </style:style>
    <style:style style:name="P49" style:family="paragraph" style:parent-style-name="Text_20_body">
      <style:text-properties officeooo:rsid="00da0bd6" officeooo:paragraph-rsid="00da0bd6"/>
    </style:style>
    <style:style style:name="P50" style:family="paragraph" style:parent-style-name="Text_20_body">
      <style:text-properties officeooo:paragraph-rsid="00f4e008"/>
    </style:style>
    <style:style style:name="P51" style:family="paragraph" style:parent-style-name="Text_20_body">
      <style:paragraph-properties fo:line-height="100%"/>
      <style:text-properties style:font-name="Liberation Mono" fo:font-size="10pt" style:font-size-asian="10pt" style:font-size-complex="10pt"/>
    </style:style>
    <style:style style:name="P52" style:family="paragraph" style:parent-style-name="Text_20_body">
      <style:text-properties officeooo:rsid="00f68181" officeooo:paragraph-rsid="00f68181"/>
    </style:style>
    <style:style style:name="P53" style:family="paragraph" style:parent-style-name="Text_20_body">
      <style:text-properties style:font-name="Liberation Mono" fo:font-size="10pt" officeooo:rsid="00f68181" officeooo:paragraph-rsid="00f68181" style:font-size-asian="10pt" style:font-size-complex="10pt"/>
    </style:style>
    <style:style style:name="P54" style:family="paragraph" style:parent-style-name="Text_20_body">
      <style:text-properties officeooo:rsid="00edeb3a" officeooo:paragraph-rsid="00edeb3a"/>
    </style:style>
    <style:style style:name="P55" style:family="paragraph" style:parent-style-name="Heading_20_1">
      <style:paragraph-properties fo:break-before="page"/>
      <style:text-properties officeooo:paragraph-rsid="008020c0"/>
    </style:style>
    <style:style style:name="P56" style:family="paragraph" style:parent-style-name="Text_20_body">
      <style:text-properties officeooo:paragraph-rsid="008020c0"/>
    </style:style>
    <style:style style:name="P57" style:family="paragraph" style:parent-style-name="Text_20_body">
      <style:text-properties officeooo:rsid="00a81806" officeooo:paragraph-rsid="00a81806"/>
    </style:style>
    <style:style style:name="P58" style:family="paragraph">
      <loext:graphic-properties draw:fill="none" draw:fill-color="#ffffff"/>
    </style:style>
    <style:style style:name="P59" style:family="paragraph" style:parent-style-name="Text_20_body">
      <style:text-properties officeooo:rsid="00aac4b4" officeooo:paragraph-rsid="00aac4b4"/>
    </style:style>
    <style:style style:name="P60" style:family="paragraph">
      <style:paragraph-properties fo:text-align="center"/>
    </style:style>
    <style:style style:name="P61" style:family="paragraph" style:parent-style-name="Heading_20_2">
      <style:paragraph-properties fo:break-before="page"/>
      <style:text-properties officeooo:paragraph-rsid="00b78a00"/>
    </style:style>
    <style:style style:name="P62" style:family="paragraph" style:parent-style-name="Text_20_body">
      <style:text-properties officeooo:rsid="00fd6d7b" officeooo:paragraph-rsid="00fd6d7b"/>
    </style:style>
    <style:style style:name="P63" style:family="paragraph">
      <loext:graphic-properties draw:fill-color="#ff0000"/>
      <style:paragraph-properties fo:text-align="center"/>
    </style:style>
    <style:style style:name="P64" style:family="paragraph" style:parent-style-name="Text_20_body">
      <style:text-properties officeooo:rsid="00d9053d" officeooo:paragraph-rsid="00d9053d"/>
    </style:style>
    <style:style style:name="P65" style:family="paragraph" style:parent-style-name="Text_20_body">
      <style:text-properties fo:font-style="normal" fo:font-weight="bold" officeooo:rsid="00ca151c" officeooo:paragraph-rsid="00d9053d" style:font-style-asian="normal" style:font-weight-asian="bold" style:font-style-complex="normal" style:font-weight-complex="bold"/>
    </style:style>
    <style:style style:name="P66" style:family="paragraph" style:parent-style-name="Text_20_body">
      <style:text-properties fo:font-weight="bold" officeooo:rsid="00c41e76" officeooo:paragraph-rsid="00c41e76" style:font-weight-asian="bold" style:font-weight-complex="bold"/>
    </style:style>
    <style:style style:name="P67" style:family="paragraph" style:parent-style-name="Text_20_body">
      <style:text-properties officeooo:rsid="00c50710" officeooo:paragraph-rsid="00d9053d"/>
    </style:style>
    <style:style style:name="P68" style:family="paragraph" style:parent-style-name="Standard">
      <style:text-properties style:font-name="Liberation Serif" fo:font-size="12pt" fo:font-style="normal" fo:font-weight="normal" officeooo:rsid="00d79519" officeooo:paragraph-rsid="00d79519" style:font-size-asian="12pt" style:font-style-asian="normal" style:font-weight-asian="normal"/>
    </style:style>
    <style:style style:name="P69" style:family="paragraph" style:parent-style-name="Standard">
      <style:text-properties officeooo:paragraph-rsid="00d79519"/>
    </style:style>
    <style:style style:name="P70" style:family="paragraph" style:parent-style-name="Standard" style:list-style-name="L5">
      <style:text-properties style:font-name="Liberation Serif" fo:font-size="12pt" fo:font-style="normal" fo:font-weight="normal" style:font-size-asian="12pt" style:font-style-asian="normal" style:font-weight-asian="normal"/>
    </style:style>
    <style:style style:name="P71" style:family="paragraph" style:parent-style-name="Text_20_body">
      <style:text-properties officeooo:rsid="00d79519" officeooo:paragraph-rsid="00d79519"/>
    </style:style>
    <style:style style:name="P72" style:family="paragraph" style:parent-style-name="Text_20_body">
      <style:text-properties officeooo:rsid="00fe5069" officeooo:paragraph-rsid="00fe5069"/>
    </style:style>
    <style:style style:name="P73" style:family="paragraph" style:parent-style-name="Text_20_body">
      <style:text-properties officeooo:rsid="00f80a2a" officeooo:paragraph-rsid="00f80a2a"/>
    </style:style>
    <style:style style:name="P74" style:family="paragraph" style:parent-style-name="Text_20_body">
      <style:text-properties officeooo:rsid="00b80cbe" officeooo:paragraph-rsid="00db576e"/>
    </style:style>
    <style:style style:name="P75" style:family="paragraph" style:parent-style-name="Text_20_body" style:list-style-name="L6">
      <style:text-properties officeooo:rsid="00aead22" officeooo:paragraph-rsid="00aead22"/>
    </style:style>
    <style:style style:name="P76" style:family="paragraph" style:parent-style-name="Heading_20_1">
      <style:paragraph-properties fo:break-before="page"/>
      <style:text-properties officeooo:rsid="00bb1517" officeooo:paragraph-rsid="00bb1517"/>
    </style:style>
    <style:style style:name="P77" style:family="paragraph" style:parent-style-name="Text_20_body">
      <style:text-properties officeooo:rsid="00f89d68" officeooo:paragraph-rsid="00f89d68"/>
    </style:style>
    <style:style style:name="P78" style:family="paragraph" style:parent-style-name="Text_20_body">
      <style:text-properties officeooo:paragraph-rsid="00f80a2a"/>
    </style:style>
    <style:style style:name="P79" style:family="paragraph" style:parent-style-name="Text_20_body">
      <style:text-properties officeooo:rsid="00fa55e4" officeooo:paragraph-rsid="00fa55e4"/>
    </style:style>
    <style:style style:name="P80" style:family="paragraph" style:parent-style-name="Heading_20_1">
      <style:text-properties officeooo:paragraph-rsid="00fa55e4"/>
    </style:style>
    <style:style style:name="P81" style:family="paragraph" style:parent-style-name="Text_20_body">
      <style:text-properties fo:font-weight="bold" style:font-weight-asian="bold" style:font-weight-complex="bold"/>
    </style:style>
    <style:style style:name="P82" style:family="paragraph" style:parent-style-name="Text_20_body">
      <style:text-properties officeooo:rsid="00e5e25a" officeooo:paragraph-rsid="00e5e25a"/>
    </style:style>
    <style:style style:name="P83" style:family="paragraph" style:parent-style-name="Text_20_body">
      <style:text-properties fo:font-style="italic" officeooo:paragraph-rsid="00e5e25a" style:font-style-asian="italic" style:font-style-complex="italic"/>
    </style:style>
    <style:style style:name="P84" style:family="paragraph" style:parent-style-name="Text_20_body">
      <style:text-properties officeooo:paragraph-rsid="00e5e25a"/>
    </style:style>
    <style:style style:name="P85" style:family="paragraph" style:parent-style-name="Text_20_body_20_Lyubcho">
      <style:text-properties officeooo:paragraph-rsid="00fd6d7b"/>
    </style:style>
    <style:style style:name="P86" style:family="paragraph" style:parent-style-name="Text_20_body_20_Lyubcho">
      <style:text-properties fo:font-size="11pt" officeooo:paragraph-rsid="00fd6d7b" style:font-size-asian="11pt" style:font-size-complex="11pt"/>
    </style:style>
    <style:style style:name="P87" style:family="paragraph" style:parent-style-name="Text_20_body" style:master-page-name="">
      <style:paragraph-properties style:page-number="auto" fo:padding="0.0591in" fo:border="0.06pt solid #000000" style:shadow="none">
        <style:tab-stops/>
      </style:paragraph-properties>
      <style:text-properties fo:font-variant="normal" fo:text-transform="none" fo:color="#000000" loext:opacity="100%" style:font-name="Liberation Mono" fo:font-size="8pt" fo:letter-spacing="normal" fo:language="en" fo:country="US" fo:font-style="normal" fo:font-weight="normal" officeooo:paragraph-rsid="00fd6d7b" style:font-size-asian="8pt" style:font-style-asian="normal" style:font-weight-asian="normal" style:font-size-complex="8pt" style:font-style-complex="normal" style:font-weight-complex="normal"/>
    </style:style>
    <style:style style:name="P88" style:family="paragraph" style:parent-style-name="Text_20_body">
      <style:paragraph-properties fo:margin-left="0in" fo:margin-right="0in" fo:margin-top="0in" fo:margin-bottom="0.1563in" style:contextual-spacing="false" style:line-height-at-least="0.2083in" fo:text-align="justify" style:justify-single-word="false" fo:text-indent="0in" style:auto-text-indent="false" fo:padding="0.0591in" fo:border="0.06pt solid #000000" style:shadow="none">
        <style:tab-stops/>
      </style:paragraph-properties>
      <style:text-properties fo:font-variant="normal" fo:text-transform="none" fo:color="#000000" loext:opacity="100%" style:font-name="Liberation Mono" fo:font-size="8pt" fo:letter-spacing="normal" fo:language="en" fo:country="US" fo:font-style="normal" fo:font-weight="normal" officeooo:paragraph-rsid="00fd6d7b" style:font-size-asian="8pt" style:font-size-complex="8pt"/>
    </style:style>
    <style:style style:name="P89" style:family="paragraph" style:parent-style-name="Text_20_body_20_Lyubcho" style:list-style-name="">
      <style:text-properties officeooo:paragraph-rsid="00fd6d7b"/>
    </style:style>
    <style:style style:name="P90" style:family="paragraph" style:parent-style-name="Text_20_body">
      <style:text-properties officeooo:rsid="00549c04" officeooo:paragraph-rsid="00e8b607"/>
    </style:style>
    <style:style style:name="P91" style:family="paragraph" style:parent-style-name="Text_20_body">
      <style:text-properties officeooo:rsid="00549c04" officeooo:paragraph-rsid="00549c04"/>
    </style:style>
    <style:style style:name="P92" style:family="paragraph" style:parent-style-name="Text_20_body">
      <style:text-properties officeooo:rsid="009da82c" officeooo:paragraph-rsid="009da82c"/>
    </style:style>
    <style:style style:name="T1" style:family="text">
      <style:text-properties fo:color="#0066b3" loext:opacity="100%" style:font-name="Noto Sans CJK JP Bold" fo:font-size="60pt" fo:font-style="normal" style:text-underline-style="solid" style:text-underline-width="auto" style:text-underline-color="font-color" fo:font-weight="normal" officeooo:rsid="00a0c4d1" style:font-size-asian="60pt" style:font-style-asian="normal" style:font-weight-asian="normal" style:font-size-complex="60pt" style:font-style-complex="normal" style:font-weight-complex="normal"/>
    </style:style>
    <style:style style:name="T2" style:family="text">
      <style:text-properties fo:color="#0066b3" loext:opacity="100%" style:font-name="Noto Sans CJK JP Bold" fo:font-size="60pt" fo:font-style="normal" style:text-underline-style="solid" style:text-underline-width="auto" style:text-underline-color="font-color" fo:font-weight="normal" officeooo:rsid="00b30e5c" style:font-size-asian="60pt" style:font-style-asian="normal" style:font-weight-asian="normal" style:font-size-complex="60pt" style:font-style-complex="normal" style:font-weight-complex="normal"/>
    </style:style>
    <style:style style:name="T3" style:family="text">
      <style:text-properties officeooo:rsid="00b5133e"/>
    </style:style>
    <style:style style:name="T4" style:family="text">
      <style:text-properties officeooo:rsid="00b35c3d"/>
    </style:style>
    <style:style style:name="T5" style:family="text">
      <style:text-properties officeooo:rsid="00e78e3d"/>
    </style:style>
    <style:style style:name="T6" style:family="text">
      <style:text-properties officeooo:rsid="00b30e5c"/>
    </style:style>
    <style:style style:name="T7" style:family="text">
      <style:text-properties officeooo:rsid="008020c0"/>
    </style:style>
    <style:style style:name="T8" style:family="text">
      <style:text-properties officeooo:rsid="00253f24"/>
    </style:style>
    <style:style style:name="T9" style:family="text">
      <style:text-properties officeooo:rsid="00b55a05"/>
    </style:style>
    <style:style style:name="T10" style:family="text">
      <style:text-properties officeooo:rsid="0089e77a"/>
    </style:style>
    <style:style style:name="T11" style:family="text">
      <style:text-properties officeooo:rsid="00a0c4d1"/>
    </style:style>
    <style:style style:name="T12" style:family="text">
      <style:text-properties fo:font-variant="normal" fo:text-transform="none" fo:color="#24292e" loext:opacity="100%" style:font-name="Liberation Serif1" fo:font-size="12pt" fo:letter-spacing="normal" fo:font-style="normal"/>
    </style:style>
    <style:style style:name="T13" style:family="text">
      <style:text-properties fo:font-variant="normal" fo:text-transform="none" fo:color="#24292e" loext:opacity="100%" style:font-name="Liberation Serif1" fo:font-size="12pt" fo:letter-spacing="normal" fo:font-style="normal" fo:font-weight="normal"/>
    </style:style>
    <style:style style:name="T14" style:family="text">
      <style:text-properties fo:font-variant="normal" fo:text-transform="none" fo:color="#24292e" loext:opacity="100%" style:font-name="Liberation Serif1" fo:font-size="12pt" fo:letter-spacing="normal" fo:font-style="normal" fo:font-weight="normal" officeooo:rsid="00b35c3d"/>
    </style:style>
    <style:style style:name="T15" style:family="text">
      <style:text-properties fo:font-variant="normal" fo:text-transform="none" fo:color="#24292e" loext:opacity="100%" style:font-name="Liberation Serif1" fo:font-size="12pt" fo:letter-spacing="normal" fo:font-style="normal" fo:font-weight="normal" officeooo:rsid="00bcc4ae"/>
    </style:style>
    <style:style style:name="T16" style:family="text">
      <style:text-properties fo:font-variant="normal" fo:text-transform="none" fo:color="#24292e" loext:opacity="100%" style:font-name="Liberation Serif1" fo:font-size="12pt" fo:letter-spacing="normal" fo:font-style="normal" fo:font-weight="normal" officeooo:rsid="00a0c4d1"/>
    </style:style>
    <style:style style:name="T17" style:family="text">
      <style:text-properties fo:font-variant="normal" fo:text-transform="none" fo:color="#24292e" loext:opacity="100%" style:font-name="Liberation Serif1" fo:font-size="12pt" fo:letter-spacing="normal" fo:font-style="normal" fo:font-weight="normal" officeooo:rsid="00b30e5c"/>
    </style:style>
    <style:style style:name="T18" style:family="text">
      <style:text-properties fo:font-variant="normal" fo:text-transform="none" fo:color="#24292e" loext:opacity="100%" style:font-name="Liberation Serif1" fo:font-size="12pt" fo:letter-spacing="normal" fo:font-style="normal" fo:font-weight="normal" officeooo:rsid="00be8d24"/>
    </style:style>
    <style:style style:name="T19" style:family="text">
      <style:text-properties fo:font-variant="normal" fo:text-transform="none" fo:color="#24292e" loext:opacity="100%" style:font-name="Liberation Serif1" fo:font-size="12pt" fo:letter-spacing="normal" fo:font-style="normal" fo:font-weight="normal" officeooo:rsid="00e5253f"/>
    </style:style>
    <style:style style:name="T20" style:family="text">
      <style:text-properties fo:font-variant="normal" fo:text-transform="none" fo:color="#24292e" loext:opacity="100%" style:font-name="Liberation Serif1" fo:font-size="12pt" fo:letter-spacing="normal" fo:font-style="normal" officeooo:rsid="00a0c4d1"/>
    </style:style>
    <style:style style:name="T21" style:family="text">
      <style:text-properties fo:font-variant="normal" fo:text-transform="none" fo:color="#24292e" loext:opacity="100%" style:font-name="Liberation Serif1" fo:font-size="12pt" fo:letter-spacing="normal" fo:font-style="normal" fo:font-weight="normal" officeooo:rsid="00b80cbe"/>
    </style:style>
    <style:style style:name="T22" style:family="text">
      <style:text-properties fo:font-variant="normal" fo:text-transform="none" fo:color="#24292e" loext:opacity="100%" style:font-name="Liberation Serif1" fo:font-size="12pt" fo:letter-spacing="normal" fo:font-style="normal" fo:font-weight="normal" officeooo:rsid="00bfb180"/>
    </style:style>
    <style:style style:name="T23" style:family="text">
      <style:text-properties fo:font-variant="normal" fo:text-transform="none" fo:color="#24292e" loext:opacity="100%" style:font-name="Liberation Serif1" fo:font-size="12pt" fo:letter-spacing="normal" fo:font-style="normal" fo:font-weight="normal" officeooo:rsid="00c035d6"/>
    </style:style>
    <style:style style:name="T24" style:family="text">
      <style:text-properties fo:font-variant="normal" fo:text-transform="none" fo:color="#24292e" loext:opacity="100%" style:font-name="Liberation Serif1" fo:font-size="12pt" fo:letter-spacing="normal" fo:font-style="normal" fo:font-weight="normal" officeooo:rsid="00c1c5fa"/>
    </style:style>
    <style:style style:name="T25" style:family="text">
      <style:text-properties officeooo:rsid="00be8d24"/>
    </style:style>
    <style:style style:name="T26" style:family="text">
      <style:text-properties officeooo:rsid="00b6451c"/>
    </style:style>
    <style:style style:name="T27" style:family="text">
      <style:text-properties officeooo:rsid="00ca151c"/>
    </style:style>
    <style:style style:name="T28" style:family="text">
      <style:text-properties officeooo:rsid="00b80cbe"/>
    </style:style>
    <style:style style:name="T29" style:family="text">
      <style:text-properties officeooo:rsid="00c8715b"/>
    </style:style>
    <style:style style:name="T30" style:family="text">
      <style:text-properties officeooo:rsid="00b8c5f9"/>
    </style:style>
    <style:style style:name="T31" style:family="text">
      <style:text-properties officeooo:rsid="00e3b1ce"/>
    </style:style>
    <style:style style:name="T32" style:family="text">
      <style:text-properties officeooo:rsid="00bab2a6"/>
    </style:style>
    <style:style style:name="T33" style:family="text">
      <style:text-properties officeooo:rsid="00ea8f8a"/>
    </style:style>
    <style:style style:name="T34" style:family="text">
      <style:text-properties officeooo:rsid="00b78a00"/>
    </style:style>
    <style:style style:name="T35" style:family="text">
      <style:text-properties officeooo:rsid="00cc6ffb"/>
    </style:style>
    <style:style style:name="T36" style:family="text">
      <style:text-properties officeooo:rsid="00ebfb31"/>
    </style:style>
    <style:style style:name="T37" style:family="text">
      <style:text-properties officeooo:rsid="00f14dc2"/>
    </style:style>
    <style:style style:name="T38" style:family="text">
      <style:text-properties officeooo:rsid="00e3c021"/>
    </style:style>
    <style:style style:name="T39" style:family="text">
      <style:text-properties officeooo:rsid="00e5253f"/>
    </style:style>
    <style:style style:name="T40" style:family="text">
      <style:text-properties officeooo:rsid="00cdb8c5"/>
    </style:style>
    <style:style style:name="T41" style:family="text">
      <style:text-properties officeooo:rsid="00da0bd6"/>
    </style:style>
    <style:style style:name="T42" style:family="text">
      <style:text-properties officeooo:rsid="00edeb3a"/>
    </style:style>
    <style:style style:name="T43" style:family="text">
      <style:text-properties officeooo:rsid="00f4e008"/>
    </style:style>
    <style:style style:name="T44" style:family="text">
      <style:text-properties officeooo:rsid="00f68181"/>
    </style:style>
    <style:style style:name="T45" style:family="text">
      <style:text-properties officeooo:rsid="00f04dad"/>
    </style:style>
    <style:style style:name="T46" style:family="text">
      <style:text-properties officeooo:rsid="00f89d68"/>
    </style:style>
    <style:style style:name="T47" style:family="text">
      <style:text-properties officeooo:rsid="00f80a2a"/>
    </style:style>
    <style:style style:name="T48" style:family="text">
      <style:text-properties officeooo:rsid="00ef04e9"/>
    </style:style>
    <style:style style:name="T49" style:family="text">
      <style:text-properties officeooo:rsid="00db576e"/>
    </style:style>
    <style:style style:name="T50" style:family="text">
      <style:text-properties officeooo:rsid="00c50710"/>
    </style:style>
    <style:style style:name="T51" style:family="text">
      <style:text-properties style:font-name="Liberation Serif" fo:font-size="12pt" fo:font-style="normal" fo:font-weight="normal" officeooo:rsid="00d79519" style:font-size-asian="12pt" style:font-style-asian="normal" style:font-weight-asian="normal"/>
    </style:style>
    <style:style style:name="T52" style:family="text">
      <style:text-properties style:font-name="Liberation Serif" fo:font-size="12pt" fo:font-style="normal" fo:font-weight="normal" style:font-size-asian="12pt" style:font-style-asian="normal" style:font-weight-asian="normal"/>
    </style:style>
    <style:style style:name="T53" style:family="text">
      <style:text-properties officeooo:rsid="00d79519"/>
    </style:style>
    <style:style style:name="T54" style:family="text">
      <style:text-properties officeooo:rsid="00de3c51"/>
    </style:style>
    <style:style style:name="T55" style:family="text">
      <style:text-properties fo:font-weight="bold" style:font-weight-asian="bold" style:font-weight-complex="bold"/>
    </style:style>
    <style:style style:name="T56" style:family="text">
      <style:text-properties officeooo:rsid="00ce46f7"/>
    </style:style>
    <style:style style:name="T57" style:family="text">
      <style:text-properties officeooo:rsid="00fa55e4"/>
    </style:style>
    <style:style style:name="T58" style:family="text">
      <style:text-properties officeooo:rsid="00fa4ef2"/>
    </style:style>
    <style:style style:name="T59" style:family="text">
      <style:text-properties officeooo:rsid="00bcc4ae"/>
    </style:style>
    <style:style style:name="T60" style:family="text">
      <style:text-properties officeooo:rsid="00fbe924"/>
    </style:style>
    <style:style style:name="T61" style:family="text">
      <style:text-properties fo:font-style="italic" style:font-style-asian="italic" style:font-style-complex="italic"/>
    </style:style>
    <style:style style:name="T62" style:family="text">
      <style:text-properties officeooo:rsid="00e5e25a"/>
    </style:style>
    <style:style style:name="T63" style:family="text">
      <style:text-properties fo:font-size="12pt" fo:language="en" fo:country="US" style:font-size-asian="12pt" style:font-name-complex="Calibri" style:font-size-complex="12pt" style:font-weight-complex="bold"/>
    </style:style>
    <style:style style:name="T64" style:family="text">
      <style:text-properties fo:font-size="12pt" fo:language="en" fo:country="US" officeooo:rsid="00fd6d7b" style:font-size-asian="12pt" style:font-name-complex="Calibri" style:font-size-complex="12pt" style:font-weight-complex="bold"/>
    </style:style>
    <style:style style:name="T65" style:family="text">
      <style:text-properties fo:language="en" fo:country="US" officeooo:rsid="01571b1e" style:font-name-complex="Calibri" style:font-weight-complex="bold"/>
    </style:style>
    <style:style style:name="T66" style:family="text">
      <style:text-properties fo:language="en" fo:country="US" style:font-name-complex="Calibri" style:font-weight-complex="bold"/>
    </style:style>
    <style:style style:name="T67" style:family="text">
      <style:text-properties fo:language="en" fo:country="US"/>
    </style:style>
    <style:style style:name="T68" style:family="text">
      <style:text-properties officeooo:rsid="00773ec9"/>
    </style:style>
    <style:style style:name="T69" style:family="text">
      <style:text-properties fo:font-size="12pt" fo:language="en" fo:country="US" officeooo:rsid="007741fc" style:font-size-asian="12pt" style:font-size-complex="12pt"/>
    </style:style>
    <style:style style:name="T70" style:family="text">
      <style:text-properties fo:font-size="12pt" fo:language="en" fo:country="US" style:font-size-asian="12pt" style:font-size-complex="12pt"/>
    </style:style>
    <style:style style:name="T71" style:family="text">
      <style:text-properties officeooo:rsid="00bb1517"/>
    </style:style>
    <style:style style:name="T72" style:family="text">
      <style:text-properties officeooo:rsid="00e8b607"/>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8"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57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201in" svg:stroke-color="#ff0000" draw:marker-start-width="0.2in" draw:marker-end-width="0.2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01in"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201in" svg:stroke-color="#ff0000"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60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29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201in" svg:stroke-color="#ff0000" draw:marker-start-width="0.2008in" draw:marker-end-width="0.2008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201in" svg:stroke-color="#ff0000" draw:marker-start-width="0.1689in" draw:marker-end-width="0.1689in" draw:fill-color="#ff0000"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2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68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37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draw:fill="none" draw:fill-color="#ffffff" fo:min-height="0.693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stroke="none" svg:stroke-color="#000000" draw:fill="none" draw:fill-color="#ffffff" fo:min-height="0.859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stroke="none" svg:stroke-color="#000000" draw:fill="none" draw:fill-color="#ffffff" fo:min-height="0.4953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
      <text:p text:style-name="Text_20_body"><draw:frame draw:style-name="fr2" draw:name="Image2" text:anchor-type="char" svg:width="3.8252in" svg:height="3.8252in" draw:z-index="12"><draw:image xlink:href="Pictures/10000000000007D0000007D0AD3DE681.jpg" xlink:type="simple" xlink:show="embed" xlink:actuate="onLoad" draw:mime-type="image/jpeg"/></draw:frame></text:p>
      <text:p text:style-name="P1"><text:span text:style-name="T1">USB-</text:span><text:span text:style-name="T2">LTE4G-EU</text:span></text:p>
      <text:p text:style-name="P2">User Manual</text:p>
      <text:p text:style-name="P2"/>
      <table:table table:name="Table1" table:style-name="Table1">
        <table:table-column table:style-name="Table1.A"/>
        <table:table-column table:style-name="Table1.B"/>
        <table:table-row>
          <table:table-cell table:style-name="Table1.A1" office:value-type="string">
            <text:p text:style-name="P3"><text:span text:style-name="T3">D</text:span><text:span text:style-name="T4">ocument </text:span><text:span text:style-name="T5">2</text:span>.<text:span text:style-name="T5">0</text:span> <text:span text:style-name="T3">J</text:span><text:span text:style-name="T6">une</text:span> 20<text:span text:style-name="T7">2</text:span><text:span text:style-name="T6">6</text:span></text:p>
          </table:table-cell>
          <table:table-cell table:style-name="Table1.A1" office:value-type="string">
            <text:p text:style-name="P4"><text:span text:style-name="T4">www.</text:span><text:span text:style-name="T3">OLIMEX</text:span><text:span text:style-name="T8">.com</text:span></text:p>
          </table:table-cell>
        </table:table-row>
      </table:table>
      <text:p text:style-name="P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2487_3915701551" text:style-name="Index_20_Link" text:visited-style-name="Index_20_Link">1. Introduction<text:tab/>3</text:a></text:p>
          <text:p text:style-name="P7"><text:a xlink:type="simple" xlink:href="#__RefHeading___Toc763_467717262" text:style-name="Index_20_Link" text:visited-style-name="Index_20_Link">1.1. What is USB-LTE4G-EU<text:tab/>3</text:a></text:p>
          <text:p text:style-name="P7"><text:a xlink:type="simple" xlink:href="#__RefHeading___Toc765_467717262" text:style-name="Index_20_Link" text:visited-style-name="Index_20_Link">1.2. Board features<text:tab/>4</text:a></text:p>
          <text:p text:style-name="P7"><text:a xlink:type="simple" xlink:href="#__RefHeading___Toc2406_360447580" text:style-name="Index_20_Link" text:visited-style-name="Index_20_Link">1.3. USB-LTE4G-EU ordering options<text:tab/>5</text:a></text:p>
          <text:p text:style-name="P7"><text:a xlink:type="simple" xlink:href="#__RefHeading___Toc2406_360447580%20Copy%201" text:style-name="Index_20_Link" text:visited-style-name="Index_20_Link">1.4. License information<text:tab/>5</text:a></text:p>
          <text:p text:style-name="P6"><text:a xlink:type="simple" xlink:href="#__RefHeading___Toc890_467717262" text:style-name="Index_20_Link" text:visited-style-name="Index_20_Link">2. Quick start up<text:tab/>6</text:a></text:p>
          <text:p text:style-name="P7"><text:a xlink:type="simple" xlink:href="#__RefHeading___Toc2408_360447580%20Copy%201" text:style-name="Index_20_Link" text:visited-style-name="Index_20_Link">2.1. Hardware connection<text:tab/>6</text:a></text:p>
          <text:p text:style-name="P7"><text:a xlink:type="simple" xlink:href="#__RefHeading___Toc2408_360447580" text:style-name="Index_20_Link" text:visited-style-name="Index_20_Link">2.2. USB-LTE4G-EU software installation<text:tab/>7</text:a></text:p>
          <text:p text:style-name="P8"><text:a xlink:type="simple" xlink:href="#__RefHeading___Toc1367_1244489498" text:style-name="Index_20_Link" text:visited-style-name="Index_20_Link">2.2.1. Windows installation<text:tab/>7</text:a></text:p>
          <text:p text:style-name="P8"><text:a xlink:type="simple" xlink:href="#__RefHeading___Toc1369_1244489498" text:style-name="Index_20_Link" text:visited-style-name="Index_20_Link">2.2.2. Linux installation<text:tab/>8</text:a></text:p>
          <text:p text:style-name="P7"><text:a xlink:type="simple" xlink:href="#__RefHeading___Toc1308_203368328" text:style-name="Index_20_Link" text:visited-style-name="Index_20_Link">2.3. BOX-LTE4G assembly<text:tab/>10</text:a></text:p>
          <text:p text:style-name="P6"><text:a xlink:type="simple" xlink:href="#__RefHeading___Toc2552_3587637980" text:style-name="Index_20_Link" text:visited-style-name="Index_20_Link">3. Hardware<text:tab/>12</text:a></text:p>
          <text:p text:style-name="P7"><text:a xlink:type="simple" xlink:href="#__RefHeading___Toc892_467717262" text:style-name="Index_20_Link" text:visited-style-name="Index_20_Link">3.1. USB-LTE4G-EU top layout<text:tab/>12</text:a></text:p>
          <text:p text:style-name="P7"><text:a xlink:type="simple" xlink:href="#__RefHeading___Toc894_467717262" text:style-name="Index_20_Link" text:visited-style-name="Index_20_Link">3.2. USB-LTE4G-EU bottom layout<text:tab/>13</text:a></text:p>
          <text:p text:style-name="P7"><text:a xlink:type="simple" xlink:href="#__RefHeading___Toc896_467717262" text:style-name="Index_20_Link" text:visited-style-name="Index_20_Link">3.3. EXT1 header<text:tab/>14</text:a></text:p>
          <text:p text:style-name="P7"><text:a xlink:type="simple" xlink:href="#__RefHeading___Toc898_467717262" text:style-name="Index_20_Link" text:visited-style-name="Index_20_Link">3.4. LEDs<text:tab/>15</text:a></text:p>
          <text:p text:style-name="P7"><text:a xlink:type="simple" xlink:href="#__RefHeading___Toc900_467717262" text:style-name="Index_20_Link" text:visited-style-name="Index_20_Link">3.5. DFU1 PTH jumper<text:tab/>15</text:a></text:p>
          <text:p text:style-name="P7"><text:a xlink:type="simple" xlink:href="#__RefHeading___Toc1310_203368328" text:style-name="Index_20_Link" text:visited-style-name="Index_20_Link">3.6. USB-LTE4G-EU board dimensions<text:tab/>16</text:a></text:p>
          <text:p text:style-name="P7"><text:a xlink:type="simple" xlink:href="#__RefHeading___Toc1408_203368328" text:style-name="Index_20_Link" text:visited-style-name="Index_20_Link">3.7. BOX-LTE4G dimensions<text:tab/>17</text:a></text:p>
          <text:p text:style-name="P7"><text:a xlink:type="simple" xlink:href="#__RefHeading___Toc2476_3915701551" text:style-name="Index_20_Link" text:visited-style-name="Index_20_Link">3.8. USB-LTE4G-EU power consumption<text:tab/>18</text:a></text:p>
          <text:p text:style-name="P6"><text:a xlink:type="simple" xlink:href="#__RefHeading___Toc1025_467717262" text:style-name="Index_20_Link" text:visited-style-name="Index_20_Link">4. Software<text:tab/>19</text:a></text:p>
          <text:p text:style-name="P6"><text:a xlink:type="simple" xlink:href="#__RefHeading___Toc1135_467717262" text:style-name="Index_20_Link" text:visited-style-name="Index_20_Link">5. Additional documents<text:tab/>19</text:a></text:p>
          <text:p text:style-name="P6"><text:a xlink:type="simple" xlink:href="#__RefHeading___Toc14695_1467883905" text:style-name="Index_20_Link" text:visited-style-name="Index_20_Link">6. FAQ<text:tab/>19</text:a></text:p>
          <text:p text:style-name="P6"><text:a xlink:type="simple" xlink:href="#__RefHeading___Toc1027_467717262" text:style-name="Index_20_Link" text:visited-style-name="Index_20_Link">7. Warranty and returns<text:tab/>20</text:a></text:p>
          <text:p text:style-name="P6"><text:a xlink:type="simple" xlink:href="#__RefHeading___Toc2484_3915701551" text:style-name="Index_20_Link" text:visited-style-name="Index_20_Link">8. Document revision history<text:tab/>21</text:a></text:p>
        </text:index-body>
      </text:table-of-content>
      <text:h text:style-name="P9" text:outline-level="1"/>
      <text:h text:style-name="P10" text:outline-level="1"><text:bookmark-start text:name="__RefHeading___Toc2487_3915701551"/>1. Introduction<text:bookmark-end text:name="__RefHeading___Toc2487_3915701551"/></text:h>
      <text:h text:style-name="Heading_20_2" text:outline-level="2"><text:bookmark-start text:name="__RefHeading___Toc763_467717262"/><text:span text:style-name="T9">1.1. </text:span>W<text:span text:style-name="T10">hat</text:span> <text:span text:style-name="T10">is</text:span> <text:span text:style-name="T11">USB-</text:span><text:span text:style-name="T6">LTE4G-EU</text:span><text:bookmark-end text:name="__RefHeading___Toc763_467717262"/></text:h>
      <text:p text:style-name="P11"><text:bookmark-start text:name="__RefHeading___Toc2489_3915701551"/><text:span text:style-name="Strong_20_Emphasis"><text:span text:style-name="T12">USB-LTE4G-EU</text:span></text:span><text:span text:style-name="T13"> is </text:span><text:span text:style-name="T14">a small and r</text:span><text:span text:style-name="T13">eliable 4G LTE USB </text:span><text:span text:style-name="T14">m</text:span><text:span text:style-name="T13">odem </text:span><text:span text:style-name="T15">board </text:span><text:span text:style-name="T14">with </text:span><text:span text:style-name="T13">Quectel EG800K-EU </text:span><text:span text:style-name="T14">module.</text:span><text:span text:style-name="T13"> </text:span><text:span text:style-name="T14">It </text:span><text:span text:style-name="T13">delivers reliable, cost-effective, and energy-efficient cellular connectivity for IoT, M2M, industrial automation, telemetry, POS terminals, remote monitoring, and embedded systems.</text:span><text:bookmark-end text:name="__RefHeading___Toc2489_3915701551"/></text:p>
      <text:p text:style-name="P12"><text:span text:style-name="T16">The </text:span><text:span text:style-name="T13">LTE speed </text:span><text:span text:style-name="T16">is </text:span><text:span text:style-name="T17">10</text:span><text:span text:style-name="T13">Mbps downlink and 5Mbps uplink, </text:span><text:span text:style-name="T16">but is b</text:span><text:span text:style-name="T13">ackward-compatible with existing EDGE and GSM/GPRS networks. </text:span><text:span text:style-name="T16">This allows USB-</text:span><text:span text:style-name="T17">LTE4G-EU</text:span><text:span text:style-name="T16"> to connect to any existing 2G, 3G and 4G network.</text:span></text:p>
      <text:p text:style-name="P13"><text:span text:style-name="T16">T</text:span><text:span text:style-name="T13">he board has </text:span><text:span text:style-name="T15">USB type C connector </text:span><text:span text:style-name="T18">for powering and data connection. </text:span><text:span text:style-name="T19">It has nano SIM connector at the bottom.</text:span><text:span text:style-name="T18"> The design </text:span><text:span text:style-name="T15">also </text:span><text:span text:style-name="T18">has</text:span><text:span text:style-name="T15"> EXT1 header which can be used for powering or data access </text:span><text:span text:style-name="T18">when embedding in own products or testing</text:span><text:span text:style-name="T15">.</text:span></text:p>
      <text:p text:style-name="P14"><text:bookmark-start text:name="__RefHeading___Toc2489_39157015511"/><text:span text:style-name="Strong_20_Emphasis"><text:span text:style-name="T20">USB-LTE4G-EU</text:span></text:span><text:span text:style-name="T16"> will w</text:span><text:span text:style-name="T13">ork with </text:span><text:span text:style-name="T21">Olimex</text:span><text:span text:style-name="T13"> OSHW Linux </text:span><text:span text:style-name="T21">c</text:span><text:span text:style-name="T13">omputers, Beaglebone and Raspberry Pi </text:span><text:span text:style-name="T16">and any other PC running Windows, Linux, or Android</text:span><text:span text:style-name="T13">.</text:span><text:bookmark-end text:name="__RefHeading___Toc2489_39157015511"/></text:p>
      <text:h text:style-name="P15" text:outline-level="2"><text:bookmark-start text:name="__RefHeading___Toc765_467717262"/>1.2. Board features <text:bookmark-end text:name="__RefHeading___Toc765_467717262"/></text:h>
      <text:p text:style-name="P11"/>
      <text:list text:style-name="L1">
        <text:list-item>
          <text:p text:style-name="P16"><text:span text:style-name="T13">Quectel EG800K-EU LTE module </text:span><text:span text:style-name="T22">with the following features:</text:span></text:p>
          <text:list>
            <text:list-item>
              <text:p text:style-name="P17">LTE Cat 1 bis technology</text:p>
            </text:list-item>
            <text:list-item>
              <text:p text:style-name="P17">Download speeds up to 10 Mbps</text:p>
            </text:list-item>
            <text:list-item>
              <text:p text:style-name="P18">Upload speeds up to 5 Mbps</text:p>
            </text:list-item>
            <text:list-item>
              <text:p text:style-name="P17">Frequency bands EU: B1/B3/B5/B7/B8/B20/B28</text:p>
            </text:list-item>
            <text:list-item>
              <text:p text:style-name="P17">AT commands: Complies with 3GPP TS 27.007 and 3GPP TS 27.005</text:p>
            </text:list-item>
            <text:list-item>
              <text:p text:style-name="P17">Supports 3GPP Rel-13 Cat 1 bis FDD</text:p>
            </text:list-item>
            <text:list-item>
              <text:p text:style-name="P17">Supports UL QPSK and 16QAM modulations</text:p>
            </text:list-item>
            <text:list-item>
              <text:p text:style-name="P17">Supports DL QPSK, 16QAM and 64QAM modulations</text:p>
            </text:list-item>
            <text:list-item>
              <text:p text:style-name="P17">Supports 1.4/3/5/10/15/20 MHz RF bandwidths</text:p>
            </text:list-item>
          </text:list>
        </text:list-item>
        <text:list-item>
          <text:p text:style-name="P16"><text:span text:style-name="T13">USB-C connector with USB 2.0 interface for power and </text:span><text:span text:style-name="T22">serial </text:span><text:span text:style-name="T13">communication</text:span></text:p>
        </text:list-item>
        <text:list-item>
          <text:p text:style-name="P19">Nano SIM holder</text:p>
        </text:list-item>
        <text:list-item>
          <text:p text:style-name="P16"><text:span text:style-name="T13">Auto</text:span><text:span text:style-name="T22">matic module turn on circuit upon</text:span><text:span text:style-name="T13"> power </text:span><text:span text:style-name="T22">up</text:span></text:p>
        </text:list-item>
      </text:list>
      <text:list text:style-name="L2">
        <text:list-item>
          <text:p text:style-name="P20"><text:span text:style-name="T13">EXT1 header </text:span><text:span text:style-name="T23">for external power supply </text:span><text:span text:style-name="T24">input</text:span><text:span text:style-name="T23">, main UART with </text:span><text:span text:style-name="T24">RX, TX, and </text:span><text:span text:style-name="T23">DTR, </text:span><text:span text:style-name="T24">module </text:span><text:span text:style-name="T23">reset </text:span><text:span text:style-name="T24">pin</text:span><text:span text:style-name="T23">, module </text:span><text:span text:style-name="T24">turn on-off pin, power out</text:span></text:p>
        </text:list-item>
        <text:list-item>
          <text:p text:style-name="P21">Two status LEDs</text:p>
        </text:list-item>
        <text:list-item>
          <text:p text:style-name="P21">U.FL connector for GSM antenna</text:p>
        </text:list-item>
        <text:list-item>
          <text:p text:style-name="P20"><text:span text:style-name="T13">Three </text:span><text:span text:style-name="T23">grounded metallized mounting holes</text:span></text:p>
        </text:list-item>
        <text:list-item>
          <text:p text:style-name="P22"><text:span text:style-name="T22">Current c</text:span><text:span text:style-name="T13">onsumption: 20μA @Power off, 3mA @Sleep, 22mA @Idle, 50-350mA when active, up to 2A burst consumption</text:span></text:p>
        </text:list-item>
        <text:list-item>
          <text:p text:style-name="P21">Operating temperature range: -35+75C</text:p>
        </text:list-item>
        <text:list-item>
          <text:p text:style-name="P23">Industrial-grade reliability</text:p>
        </text:list-item>
        <text:list-item>
          <text:p text:style-name="P24">Support for Windows, Linux, and Android platforms</text:p>
        </text:list-item>
        <text:list-item>
          <text:p text:style-name="P21">Dimensions: (34 x 25 x 6)mm</text:p>
        </text:list-item>
      </text:list>
      <text:p text:style-name="P11"><text:bookmark text:name="__RefHeading___Toc2487_3915701551 Copy 1"/></text:p>
      <text:h text:style-name="P15" text:outline-level="2"><text:bookmark-start text:name="__RefHeading___Toc2406_360447580"/><text:span text:style-name="T9">1.3. </text:span>USB-<text:span text:style-name="T6">LTE4G-EU</text:span> ordering options<text:bookmark-end text:name="__RefHeading___Toc2406_360447580"/></text:h>
      <text:p text:style-name="Standard"/>
      <text:p text:style-name="P25">It is recommended to start with<text:span text:style-name="T25"> the</text:span> <text:a xlink:type="simple" xlink:href="https://www.olimex.com/Products/IoT/LTE/USB-LTE4G-EU-ANT/" text:style-name="Internet_20_link" text:visited-style-name="Visited_20_Internet_20_Link">USB-LTE4G-EU-ANT</text:a><text:span text:style-name="T11"> </text:span>version.</text:p>
      <text:p text:style-name="Standard"/>
      <text:p text:style-name="Text_20_body"><text:bookmark-start text:name="__RefHeading___Toc2497_3915701551"/><text:span text:style-name="T11">USB-</text:span><text:span text:style-name="T6">LTE4G-EU</text:span><text:span text:style-name="T11"> can be ordered </text:span><text:span text:style-name="T25">with our without antenna</text:span>:<text:bookmark-end text:name="__RefHeading___Toc2497_3915701551"/></text:p>
      <text:list text:style-name="L3">
        <text:list-item>
          <text:p text:style-name="P26"><text:a xlink:type="simple" xlink:href="https://www.olimex.com/Products/IoT/LTE/USB-LTE4G-EU-ANT/" text:style-name="Internet_20_link" text:visited-style-name="Visited_20_Internet_20_Link">USB-LTE4G-EU-ANT</text:a><text:span text:style-name="T11"> the module with GSM multiband antenna</text:span></text:p>
        </text:list-item>
        <text:list-item>
          <text:p text:style-name="P27"><text:a xlink:type="simple" xlink:href="https://www.olimex.com/Products/IoT/LTE/USB-LTE4G-EU/" text:style-name="Internet_20_link" text:visited-style-name="Visited_20_Internet_20_Link"><text:bookmark-start text:name="__RefHeading___Toc2499_3915701551"/><text:span text:style-name="T11">USB-</text:span><text:span text:style-name="T6">LTE4G-EU</text:span></text:a><text:span text:style-name="T11"> just the module </text:span><text:span text:style-name="T26">without u.FL GSM antenna</text:span><text:bookmark-end text:name="__RefHeading___Toc2499_3915701551"/></text:p>
        </text:list-item>
      </text:list>
      <text:p text:style-name="P28"><text:tab/>We can manufacture <text:span text:style-name="T26">NA version upon request but the NA version of the module is significantly <text:tab/>more expensive.</text:span></text:p>
      <text:p text:style-name="P29"><text:span text:style-name="T27">There is</text:span><text:span text:style-name="T26"> a custom 3D printed plastic box </text:span><text:span text:style-name="T27">available</text:span><text:span text:style-name="T26"> for the module. </text:span><text:span text:style-name="T27">It </text:span><text:span text:style-name="T26">can be purchased separately:</text:span></text:p>
      <text:list text:continue-numbering="true" text:style-name="L3">
        <text:list-item>
          <text:p text:style-name="P30"><text:a xlink:type="simple" xlink:href="https://www.olimex.com/Products/IoT/LTE/BOX-LTE4G/" text:style-name="Internet_20_link" text:visited-style-name="Visited_20_Internet_20_Link">BOX-USB-LTE4G</text:a> – <text:span text:style-name="T26">keeps the antenna and the module safe, only USB type C connector exposed.</text:span></text:p>
        </text:list-item>
      </text:list>
      <text:p text:style-name="P31">Cables and extras:</text:p>
      <text:list text:style-name="L4">
        <text:list-item>
          <text:p text:style-name="P32"><text:a xlink:type="simple" xlink:href="https://www.olimex.com/Products/Components/Cables/USB/USB-CABLE-A-TO-C-15CM/" text:style-name="Internet_20_link" text:visited-style-name="Visited_20_Internet_20_Link">USB-CABLE-A-TO-C-15CM</text:a> – short USB type C to type A connector to reduce chances for high capacitance; 4G modules have <text:span text:style-name="T28">up to 2A burst current consumption</text:span></text:p>
        </text:list-item>
        <text:list-item>
          <text:p text:style-name="P33"><text:a xlink:type="simple" xlink:href="https://www.olimex.com/Products/USB-Modules/USB-CAP/" text:style-name="Internet_20_link" text:visited-style-name="Visited_20_Internet_20_Link">USB-CAP</text:a> - USB supply filtering to enable the operation of current-hungry devices with weak USB hosts</text:p>
        </text:list-item>
        <text:list-item>
          <text:p text:style-name="P34"><text:a xlink:type="simple" xlink:href="https://www.olimex.com/Products/USB-Modules/Interfaces/USB-SERIAL-L/" text:style-name="Internet_20_link" text:visited-style-name="Visited_20_Internet_20_Link">USB-SERIAL-L</text:a> – this is a USB-serial converter compatible with 1.8V UART levels if you decide to use the EXT1 header <text:span text:style-name="T29">for the majn UART</text:span>, requires connecting <text:span text:style-name="T29">VREF to VDD_EXT</text:span></text:p>
        </text:list-item>
      </text:list>
      <text:h text:style-name="P35" text:outline-level="2"><text:bookmark-start text:name="__RefHeading___Toc2406_360447580 Copy 1"/><text:span text:style-name="T9">1.</text:span><text:span text:style-name="T28">4</text:span><text:span text:style-name="T9">. </text:span><text:span text:style-name="T28">License information</text:span><text:bookmark-end text:name="__RefHeading___Toc2406_360447580 Copy 1"/></text:h>
      <text:p text:style-name="P36">USB-LTE4G-EU <text:span text:style-name="T30">and USB-LTE4G-EU-ANT</text:span> <text:span text:style-name="T30">are </text:span><text:span text:style-name="T31">original, </text:span><text:span text:style-name="T30">propriety designs. They are</text:span> <text:span text:style-name="T32">NOT </text:span>considered OSHW (Open-source HardWare) and design files and schematics will <text:span text:style-name="T30">NOT</text:span> be shared.</text:p>
      <text:p text:style-name="P37">This document is considered OSHW and it is made with LibreOffice, <text:span text:style-name="T33">t</text:span><text:span text:style-name="T31">he source file is available at GitHub. </text:span>you are free to edit it to your liking <text:span text:style-name="T33">for personal use</text:span> as long as you respect the copyright of our trademarks. <text:span text:style-name="T33">Publishing your edited version is not recommended, if you wish to contribute, submit a PR at Olimex GitHub.</text:span></text:p>
      <text:h text:style-name="P38" text:outline-level="1"><text:bookmark-start text:name="__RefHeading___Toc890_467717262"/><text:span text:style-name="T34">2</text:span>. Quick start up<text:bookmark-end text:name="__RefHeading___Toc890_467717262"/></text:h>
      <text:h text:style-name="P39" text:outline-level="2"><text:bookmark-start text:name="__RefHeading___Toc2408_360447580 Copy 1"/><text:span text:style-name="T34">2</text:span><text:span text:style-name="T26">.1. Hardware connection</text:span><text:bookmark-end text:name="__RefHeading___Toc2408_360447580 Copy 1"/></text:h>
      <text:p text:style-name="P40">The minimum hardware connection is pretty simple:</text:p>
      <text:p text:style-name="P40">- Attach the antenna to the USB-LTE4G-EU’<text:span text:style-name="T35">s</text:span> u.FL connector, make sure it clicks and stays firm<text:span text:style-name="T35">ly</text:span> <text:span text:style-name="T35">attached, you can rotate it the way you like;</text:span></text:p>
      <text:p text:style-name="P40">- Insert nano SIM card at the back of the board, pay attention to the direction and use <text:span text:style-name="T36">thin pointer</text:span> or similar tool to make sure it is inserted in place; for absolute beginner<text:span text:style-name="T36">s</text:span> <text:span text:style-name="T36">it is recommended to</text:span> remove the PIN <text:span text:style-name="T36">code </text:span>from the SIM card using regular GSM device first;</text:p>
      <text:p text:style-name="P40">- <text:span text:style-name="T35">(Optional) If you also purchased the BOX-LTE4G, now is good time to also put the board in the box, refer to </text:span><text:span text:style-name="T37">chapter </text:span><text:span text:style-name="T35">2.3. </text:span><text:span text:style-name="T37">below</text:span><text:span text:style-name="T35"> for details</text:span></text:p>
      <text:p text:style-name="P40">- Attach use USB type C connector to attach an USB cable between the board and a computer.</text:p>
      <text:h text:style-name="P41" text:outline-level="2"/>
      <text:h text:style-name="P15" text:outline-level="2"><text:bookmark-start text:name="__RefHeading___Toc2408_360447580"/><text:span text:style-name="T34">2</text:span><text:span text:style-name="T26">.2. </text:span>USB-LTE4G-EU software installation<text:bookmark-end text:name="__RefHeading___Toc2408_360447580"/></text:h>
      <text:p text:style-name="P42"><text:span text:style-name="T38">The board comes with AT commands firmware. You just need a terminal software to access the serial port it creates. You can find the available commands here: </text:span><text:a xlink:type="simple" xlink:href="https://github.com/OLIMEX/USB-LTE4G-EU/blob/main/DOCs/Quectel_ECx00xEG800AKEG800KEG810MEG91xNEG915KEG950A_Series_AT_Commands_Manual_V1.4.pdf" text:style-name="Internet_20_link" text:visited-style-name="Visited_20_Internet_20_Link"><text:span text:style-name="T38">AT commands manual</text:span></text:a><text:span text:style-name="T38"> and list of simple test commands and replies in </text:span><text:a xlink:type="simple" xlink:href="https://github.com/OLIMEX/USB-LTE4G-EU/blob/main/SOFTWARE/Simple-AT-commands-test.txt" text:style-name="Internet_20_link" text:visited-style-name="Visited_20_Internet_20_Link"><text:span text:style-name="T38">this text file</text:span></text:a><text:span text:style-name="T38">.</text:span></text:p>
      <text:h text:style-name="P43" text:outline-level="3"><text:bookmark-start text:name="__RefHeading___Toc1367_1244489498"/>2.2.1. Windows installation<text:bookmark-end text:name="__RefHeading___Toc1367_1244489498"/></text:h>
      <text:p text:style-name="P44"><text:span text:style-name="T35">After </text:span><text:span text:style-name="T39">connecting</text:span><text:span text:style-name="T35"> the </text:span><text:span text:style-name="T39">board to the PC via</text:span><text:span text:style-name="T35"> USB </text:span><text:span text:style-name="T39">cable</text:span><text:span text:style-name="T35">, the </text:span><text:span text:style-name="T39">Windows</text:span><text:span text:style-name="T35"> should </text:span><text:span text:style-name="T39">list </text:span><text:span text:style-name="T35">a few entries in the “</text:span><text:span text:style-name="T39">Windows Device Manager”</text:span><text:span text:style-name="T35">. The interface </text:span><text:span text:style-name="T40">you are interested in </text:span><text:span text:style-name="T39">the most</text:span><text:span text:style-name="T40"> is the one where you can send AT commands, it </text:span><text:span text:style-name="T35">is the “Mobile AT Interface (Interface 3)”. </text:span><text:span text:style-name="T41">This is how </text:span><text:span text:style-name="T39">the AT interfaces should</text:span><text:span text:style-name="T41"> look under Windows:</text:span></text:p>
      <text:p text:style-name="P45"><draw:frame draw:style-name="fr3" draw:name="Image6" text:anchor-type="paragraph" svg:x="0.0173in" svg:y="-0.0425in" svg:width="3.8091in" style:rel-width="55%" svg:height="0.9929in" style:rel-height="11%" draw:z-index="27"><draw:image xlink:href="Pictures/100000010000016E0000005C95F72537.png" xlink:type="simple" xlink:show="embed" xlink:actuate="onLoad" draw:mime-type="image/png"/></draw:frame></text:p>
      <text:p text:style-name="P46"><text:span text:style-name="T41">After identifying the port, start serial terminal on it at 115200 baud. </text:span><text:span text:style-name="T42">Here below I use PuTTY:</text:span></text:p>
      <text:p text:style-name="P46"/>
      <text:p text:style-name="P46"><draw:frame draw:style-name="fr4" draw:name="Image8" text:anchor-type="paragraph" svg:width="3.4626in" style:rel-width="50%" svg:height="3.3398in" style:rel-height="37%" draw:z-index="29"><draw:image xlink:href="Pictures/10000001000001C6000001BCE549AE30.png" xlink:type="simple" xlink:show="embed" xlink:actuate="onLoad" draw:mime-type="image/png"/></draw:frame></text:p>
      <text:p text:style-name="P47">Now you should be able to send AT commands and receive replies. Type “AT” without the quotes and see if you get reply “OK”.</text:p>
      <text:p text:style-name="P48"><text:span text:style-name="T40">If you don’t see it properly or there are errors, try to install serial drivers with an open source tool like Zadig. Make sure to </text:span><text:span text:style-name="T42">go to Options → List All Devices, select the AT interface and install the USB Serial (CDC) driver.</text:span><text:span text:style-name="T40"> </text:span></text:p>
      <text:p text:style-name="P49"><text:soft-page-break/></text:p>
      <text:h text:style-name="Heading_20_3" text:outline-level="3"><text:bookmark-start text:name="__RefHeading___Toc1369_1244489498"/>2.2.2. Linux installation<text:bookmark-end text:name="__RefHeading___Toc1369_1244489498"/></text:h>
      <text:p text:style-name="P50"><text:span text:style-name="T43">C</text:span><text:span text:style-name="T39">onnect</text:span><text:span text:style-name="T35"> the </text:span><text:span text:style-name="T43">USB-LTE4G-EU</text:span><text:span text:style-name="T39"> to the PC via</text:span><text:span text:style-name="T35"> USB </text:span><text:span text:style-name="T39">cable </text:span><text:span text:style-name="T43">and</text:span><text:span text:style-name="T39"> </text:span><text:span text:style-name="T43">there should be new serial devices listed, identify the exact name </text:span><text:span text:style-name="T44">of the AT command interface</text:span><text:span text:style-name="T43"> by checking with command “dmesg”, if unsure disconnect the board use “dmesg -w” and plug it back, you’d get something like:</text:span></text:p>
      <text:p text:style-name="P50"/>
      <text:p text:style-name="P51">usb 2-1.3: new high-speed USB device number 18 using ehci-pci</text:p>
      <text:p text:style-name="P51">usb 2-1.3: New USB device found, idVendor=2ecc, idProduct=3004, bcdDevice= 0.00</text:p>
      <text:p text:style-name="P51">usb 2-1.3: New USB device strings: Mfr=1, Product=2, SerialNumber=3</text:p>
      <text:p text:style-name="P51">usb 2-1.3: Product: Arom Usb Boot Port</text:p>
      <text:p text:style-name="P51">usb 2-1.3: Manufacturer: ASR Microelectornics</text:p>
      <text:p text:style-name="P51">usb 2-1.3: SerialNumber: arom0123456789</text:p>
      <text:p text:style-name="P51">cdc_acm 2-1.3:1.0: ttyACM0: USB ACM device</text:p>
      <text:p text:style-name="P51">usb 2-1.3: USB disconnect, device number 18</text:p>
      <text:p text:style-name="P51">usb 2-1.3: new high-speed USB device number 19 using ehci-pci</text:p>
      <text:p text:style-name="P51">usb 2-1.3: New USB device found, idVendor=2c7c, idProduct=6002, bcdDevice= 3.18</text:p>
      <text:p text:style-name="P51">usb 2-1.3: New USB device strings: Mfr=1, Product=2, SerialNumber=3</text:p>
      <text:p text:style-name="P51">usb 2-1.3: Product: EG800K-EU</text:p>
      <text:p text:style-name="P51">usb 2-1.3: Manufacturer: Quectel</text:p>
      <text:p text:style-name="P51">usb 2-1.3: SerialNumber: 0000</text:p>
      <text:p text:style-name="P51">cdc_ether 2-1.3:1.0 usb0: register 'cdc_ether' at usb-0000:00:1d.0-1.3, CDC Ethernet Device, ae:0c:29:a3:9b:6d</text:p>
      <text:p text:style-name="P51">option 2-1.3:1.2: GSM modem (1-port) converter detected</text:p>
      <text:p text:style-name="P51">usb 2-1.3: GSM modem (1-port) converter now attached to ttyUSB0</text:p>
      <text:p text:style-name="P51">option 2-1.3:1.3: GSM modem (1-port) converter detected</text:p>
      <text:p text:style-name="P51">usb 2-1.3: GSM modem (1-port) converter now attached to ttyUSB1</text:p>
      <text:p text:style-name="P51">option 2-1.3:1.4: GSM modem (1-port) converter detected</text:p>
      <text:p text:style-name="P51">usb 2-1.3: GSM modem (1-port) converter now attached to ttyUSB2</text:p>
      <text:p text:style-name="P51">cdc_ether 2-1.3:1.0 enxae0c29a39b6d: renamed from usb0</text:p>
      <text:p text:style-name="Text_20_body"/>
      <text:p text:style-name="P52">Open your favorite terminal software on ttyUSB1 and you can send AT commands. I use picocom:</text:p>
      <text:p text:style-name="P53">picocom -b 115200 /dev/ttyUSB1</text:p>
      <text:p text:style-name="P53">picocom v3.1</text:p>
      <text:p text:style-name="P53"/>
      <text:p text:style-name="P53"><text:soft-page-break/>port is : /dev/ttyUSB1</text:p>
      <text:p text:style-name="P53">flowcontrol : none</text:p>
      <text:p text:style-name="P53">baudrate is : 115200</text:p>
      <text:p text:style-name="P53">parity is : none</text:p>
      <text:p text:style-name="P53">databits are : 8</text:p>
      <text:p text:style-name="P53">stopbits are : 1</text:p>
      <text:p text:style-name="P53">escape is : C-a</text:p>
      <text:p text:style-name="P53">local echo is : no</text:p>
      <text:p text:style-name="P53">noinit is : no</text:p>
      <text:p text:style-name="P53">noreset is : no</text:p>
      <text:p text:style-name="P53">hangup is : no</text:p>
      <text:p text:style-name="P53">nolock is : no</text:p>
      <text:p text:style-name="P53">send_cmd is : sz -vv</text:p>
      <text:p text:style-name="P53">receive_cmd is : rz -vv -E</text:p>
      <text:p text:style-name="P53">imap is :</text:p>
      <text:p text:style-name="P53">omap is :</text:p>
      <text:p text:style-name="P53">emap is : crcrlf,delbs,</text:p>
      <text:p text:style-name="P53">logfile is : none</text:p>
      <text:p text:style-name="P53">initstring : none</text:p>
      <text:p text:style-name="P53">exit_after is : not set</text:p>
      <text:p text:style-name="P53">exit is : no</text:p>
      <text:p text:style-name="P53"/>
      <text:p text:style-name="P53">Type [C-a] [C-h] to see available commands</text:p>
      <text:p text:style-name="P53">Terminal ready</text:p>
      <text:p text:style-name="P53">at</text:p>
      <text:p text:style-name="P53">OK</text:p>
      <text:p text:style-name="P53">ati</text:p>
      <text:p text:style-name="P53">Quectel</text:p>
      <text:p text:style-name="P53">EG800K</text:p>
      <text:p text:style-name="P53">Revision: EG800KEULCR07A07M04</text:p>
      <text:p text:style-name="P53"/>
      <text:p text:style-name="P53">OK</text:p>
      <text:h text:style-name="P15" text:outline-level="2"><text:bookmark-start text:name="__RefHeading___Toc1308_203368328"/>2.3. BOX-LTE4G assembly<text:bookmark-end text:name="__RefHeading___Toc1308_203368328"/></text:h>
      <text:p text:style-name="P54">The USB-LTE4G-EU-EA fits fully inside BOX-LTE4G. There are few steps to follow:</text:p>
      <text:p text:style-name="P54"><text:span text:style-name="T45">i</text:span>. Insert your nano SIM inside the USB-LTE4G-EU-EA and connect the antenna to the u.FL connector;</text:p>
      <text:p text:style-name="P54"><text:span text:style-name="T45">ii</text:span>. Open the BOX-LTE4G box, it consists of two parts – main <text:span text:style-name="T46">body</text:span> and <text:span text:style-name="T46">removable</text:span> plastic lid. If you struggle <text:span text:style-name="T46">separating them</text:span>, <text:span text:style-name="T47">best use an object</text:span> <text:span text:style-name="T47">to </text:span>push <text:span text:style-name="T47">the lid</text:span> from th<text:span text:style-name="T47">e USB</text:span> <text:span text:style-name="T47">opening</text:span>.</text:p>
      <text:p text:style-name="P54"><text:span text:style-name="T45">iii</text:span>. Inspect the box. <text:span text:style-name="T37">Check i</text:span>nside – there is a <text:span text:style-name="T37">fitting </text:span>for the antenna. Insert the antenna inside th<text:span text:style-name="T37">is</text:span> antenna holder – the solder point of the antenna <text:span text:style-name="T48">must </text:span>point <text:span text:style-name="T37">down,</text:span> towards the inside of the box (the flat side of the antenna slides next to the plastic wall). <text:span text:style-name="T48">Refer to the picture below:</text:span></text:p>
      <text:p text:style-name="P54"><draw:frame draw:style-name="fr4" draw:name="Image9" text:anchor-type="paragraph" svg:width="4.8472in" style:rel-width="70%" svg:height="4.2417in" style:rel-height="47%" draw:z-index="30"><draw:image xlink:href="Pictures/10000000000006C2000005E5153470E4.jpg" xlink:type="simple" xlink:show="embed" xlink:actuate="onLoad" draw:mime-type="image/jpeg"/></draw:frame></text:p>
      <text:p text:style-name="P54"/>
      <text:p text:style-name="P54"><text:span text:style-name="T45">iv</text:span>. Make a circle of the antenna cable <text:span text:style-name="T48">so that it can fit inside the box – m</text:span>ake sure not to bend <text:span text:style-name="T48">the antenna</text:span> at 90 degrees, this might break it.</text:p>
      <text:p text:style-name="P54"><text:span text:style-name="T45">v</text:span>. Insert the USB-LTE4G-EU-EA below the antenna with the USB side going first. <text:span text:style-name="T45">Refer to the picture </text:span><text:span text:style-name="T37">on the next page</text:span><text:span text:style-name="T45">:</text:span></text:p>
      <text:p text:style-name="P54"><draw:frame draw:style-name="fr5" draw:name="Image10" text:anchor-type="paragraph" svg:width="6.9252in" svg:height="3.5898in" draw:z-index="31"><draw:image xlink:href="Pictures/1000000000000647000003419F90EB06.jpg" xlink:type="simple" xlink:show="embed" xlink:actuate="onLoad" draw:mime-type="image/jpeg"/></draw:frame><text:soft-page-break/></text:p>
      <text:p text:style-name="P54"><text:span text:style-name="T45">vi</text:span>. Check the other of the box and ensure the USB fits in the opening. Make sure the whole antenna is inside.</text:p>
      <text:p text:style-name="P54"><text:span text:style-name="T45">vii</text:span>. Inspect the lid cover before placing it – you would notice it has a cut on one side. This cut is there to facilitate the antenna! Make sure the cut is at the same side as the antenna. Place the lid and close the box. <text:span text:style-name="T37">Refer to the picture below:</text:span></text:p>
      <text:p text:style-name="P54"><draw:frame draw:style-name="fr4" draw:name="Image11" text:anchor-type="paragraph" svg:width="4.5016in" style:rel-width="65%" svg:height="3.2492in" style:rel-height="36%" draw:z-index="32"><draw:image xlink:href="Pictures/10000000000007170000052F74076158.jpg" xlink:type="simple" xlink:show="embed" xlink:actuate="onLoad" draw:mime-type="image/jpeg"/></draw:frame></text:p>
      <text:h text:style-name="P55" text:outline-level="1"><text:bookmark-start text:name="__RefHeading___Toc2552_3587637980"/><text:span text:style-name="T34">3</text:span><text:span text:style-name="T26">. Hardware </text:span><text:bookmark-end text:name="__RefHeading___Toc2552_3587637980"/></text:h>
      <text:h text:style-name="Heading_20_2" text:outline-level="2"><text:bookmark-start text:name="__RefHeading___Toc892_467717262"/><text:span text:style-name="T34">3</text:span>.1. USB-LTE4G-EU top layout<text:bookmark-end text:name="__RefHeading___Toc892_467717262"/></text:h>
      <text:p text:style-name="P56"/>
      <text:p text:style-name="P57"><draw:frame text:anchor-type="paragraph" draw:z-index="4" draw:name="Shape16" draw:style-name="gr1" draw:text-style-name="P58" svg:width="1.0295in" svg:height="0.3843in" svg:x="3.6437in" svg:y="0.1252in"><draw:text-box><text:p>ModStat1 green LED</text:p></draw:text-box></draw:frame><draw:frame text:anchor-type="paragraph" draw:z-index="7" draw:name="Shape20" draw:style-name="gr2" draw:text-style-name="P58" svg:width="1.0421in" svg:height="0.4087in" svg:x="2.0701in" svg:y="0.0783in"><draw:text-box><text:p>NetStat1 yellow LED</text:p></draw:text-box></draw:frame><draw:frame text:anchor-type="paragraph" draw:z-index="2" draw:name="Shape14" draw:style-name="gr3" draw:text-style-name="P58" svg:width="1.8787in" svg:height="0.5571in" svg:x="5.1516in" svg:y="0.0929in"><draw:text-box><text:p>u.FL antenna connector; GSM antenna is mandatory</text:p></draw:text-box></draw:frame></text:p>
      <text:p text:style-name="P59"><draw:frame draw:style-name="fr6" draw:name="Image3" text:anchor-type="paragraph" svg:x="2.0327in" svg:y="0.611in" svg:width="3.4626in" style:rel-width="50%" svg:height="4.6028in" style:rel-height="51%" draw:z-index="13"><draw:image xlink:href="Pictures/1000000100000305000004096E85C99C.png" xlink:type="simple" xlink:show="embed" xlink:actuate="onLoad" draw:mime-type="image/png"/></draw:frame><draw:line text:anchor-type="paragraph" draw:z-index="18" draw:name="Shape3" draw:style-name="gr4" draw:text-style-name="P60" svg:x1="5.2181in" svg:y1="3.061in" svg:x2="6.0516in" svg:y2="2.6555in"><text:p/></draw:line><draw:line text:anchor-type="paragraph" draw:z-index="1" draw:name="Shape2" draw:style-name="gr5" draw:text-style-name="P60" svg:x1="3.6618in" svg:y1="1.6685in" svg:x2="3.9339in" svg:y2="1.3177in"><text:p/></draw:line><draw:line text:anchor-type="paragraph" draw:z-index="20" draw:name="Shape4" draw:style-name="gr6" draw:text-style-name="P60" svg:x1="3.7154in" svg:y1="4.8043in" svg:x2="4.0787in" svg:y2="5.576in"><text:p/></draw:line><draw:line text:anchor-type="paragraph" draw:z-index="24" draw:name="Shape6" draw:style-name="gr6" draw:text-style-name="P60" svg:x1="3.0083in" svg:y1="3.2874in" svg:x2="1.3965in" svg:y2="4.1in"><text:p/></draw:line><draw:line text:anchor-type="paragraph" draw:z-index="22" draw:name="Shape8" draw:style-name="gr6" draw:text-style-name="P60" svg:x1="4.061in" svg:y1="0.2543in" svg:x2="3.3839in" svg:y2="0.9406in"><text:p/></draw:line><draw:line text:anchor-type="paragraph" draw:z-index="23" draw:name="Shape9" draw:style-name="gr6" draw:text-style-name="P60" svg:x1="2.2902in" svg:y1="2.8846in" svg:x2="1.3756in" svg:y2="3.2799in"><text:p/></draw:line><draw:frame text:anchor-type="paragraph" draw:z-index="5" draw:name="Shape18" draw:style-name="gr1" draw:text-style-name="P58" svg:width="0.9768in" svg:height="0.3843in" svg:x="3.8083in" svg:y="5.6457in"><draw:text-box><text:p>USB type C</text:p></draw:text-box></draw:frame><draw:frame text:anchor-type="paragraph" draw:z-index="6" draw:name="Shape19" draw:style-name="gr7" draw:text-style-name="P58" svg:width="1.5016in" svg:height="0.6067in" svg:x="0.3118in" svg:y="2.8846in"><draw:text-box><text:p>DFU1 PTH jumper (default open)</text:p></draw:text-box></draw:frame><draw:frame text:anchor-type="paragraph" draw:z-index="3" draw:name="Shape15" draw:style-name="gr8" draw:text-style-name="P58" svg:width="0.9323in" svg:height="0.2921in" svg:x="5.6665in" svg:y="2.3638in"><draw:text-box><text:p>EXT1 header</text:p></draw:text-box></draw:frame><draw:line text:anchor-type="paragraph" draw:z-index="19" draw:name="Shape1" draw:style-name="gr9" draw:text-style-name="P60" svg:x1="4.9563in" svg:y1="0.9925in" svg:x2="5.8146in" svg:y2="0.2807in"><text:p/></draw:line><draw:line text:anchor-type="paragraph" draw:z-index="21" draw:name="Shape10" draw:style-name="gr6" draw:text-style-name="P60" svg:x1="3.1118in" svg:y1="0.9079in" svg:x2="2.5563in" svg:y2="0.2134in"><text:p/></draw:line><draw:frame text:anchor-type="paragraph" draw:z-index="25" draw:name="Shape 1" draw:style-name="gr1" draw:text-style-name="P58" svg:width="1.1335in" svg:height="0.3843in" svg:x="0.4272in" svg:y="3.9256in"><draw:text-box><text:p>Main module EG800K-EU</text:p></draw:text-box></draw:frame><draw:frame text:anchor-type="paragraph" draw:z-index="11" draw:name="Shape25" draw:style-name="gr10" draw:text-style-name="P58" svg:width="4.4976in" svg:height="1.1512in" svg:x="0.2965in" svg:y="5.9083in"><draw:text-box><text:p>Yellow LED NetStat1: </text:p><text:p>- Blink slowly (200ms High/1800ms Low) - search network</text:p><text:p>- Blink slowly (1800ms High/200ms Low) – idle</text:p><text:p>- Blink quickly (125ms High/125ms Low) – data transfer</text:p><text:p>Green LED ModStat1:<text:line-break/>- On – module is turned on</text:p></draw:text-box></draw:frame></text:p>
      <text:h text:style-name="P61" text:outline-level="2" text:is-list-header="true"><text:bookmark-start text:name="__RefHeading___Toc894_467717262"/><text:span text:style-name="T34">3</text:span>.2. USB-LTE4G-EU <text:span text:style-name="T34">bottom</text:span> layout<text:bookmark-end text:name="__RefHeading___Toc894_467717262"/></text:h>
      <text:p text:style-name="P62"><draw:frame draw:style-name="fr6" draw:name="Image4" text:anchor-type="paragraph" svg:x="1.6681in" svg:y="0.5882in" svg:width="3.4626in" style:rel-width="50%" svg:height="4.6028in" style:rel-height="51%" draw:z-index="14"><draw:image xlink:href="Pictures/10000001000002FF0000040671E81F16.png" xlink:type="simple" xlink:show="embed" xlink:actuate="onLoad" draw:mime-type="image/png"/></draw:frame><draw:line text:anchor-type="paragraph" draw:z-index="15" draw:name="Shape11" draw:style-name="gr11" draw:text-style-name="P63" svg:x1="4.0555in" svg:y1="2.8154in" svg:x2="5.8154in" svg:y2="1.8063in"><text:p/></draw:line><draw:frame text:anchor-type="paragraph" draw:z-index="8" draw:name="Shape21" draw:style-name="gr12" draw:text-style-name="P58" svg:width="1.0161in" svg:height="0.2606in" svg:x="5.5571in" svg:y="1.5457in"><draw:text-box><text:p>Nano SIM</text:p></draw:text-box></draw:frame><draw:line text:anchor-type="paragraph" draw:z-index="17" draw:name="Shape12" draw:style-name="gr6" draw:text-style-name="P60" svg:x1="2.1909in" svg:y1="4.6559in" svg:x2="0.8154in" svg:y2="4.1807in"><text:p/></draw:line><draw:frame text:anchor-type="paragraph" draw:z-index="10" draw:name="Shape23" draw:style-name="gr13" draw:text-style-name="P58" svg:width="1.0642in" svg:height="0.687in" svg:x="0.0516in" svg:y="3.8882in"><draw:text-box><text:p>Mount hole D=3.3mm</text:p></draw:text-box></draw:frame><draw:line text:anchor-type="paragraph" draw:z-index="16" draw:name="Shape13" draw:style-name="gr6" draw:text-style-name="P60" svg:x1="0.7457in" svg:y1="2.5138in" svg:x2="1.8677in" svg:y2="2.85in"><text:p/></draw:line><draw:frame text:anchor-type="paragraph" draw:z-index="9" draw:name="Shape22" draw:style-name="gr14" draw:text-style-name="P58" svg:width="0.8335in" svg:height="0.378in" svg:x="0.2508in" svg:y="2.1937in"><draw:text-box><text:p>EXT1 pins</text:p></draw:text-box></draw:frame>Notice that EXT1 header has the signal names printed near the pads. Always double check the white print to avoid problems!</text:p>
      <text:h text:style-name="P61" text:outline-level="2" text:is-list-header="true"><text:bookmark-start text:name="__RefHeading___Toc896_467717262"/><text:span text:style-name="T34">3</text:span>.<text:span text:style-name="T34">3</text:span>. <text:span text:style-name="T34">EXT1 header</text:span><text:bookmark-end text:name="__RefHeading___Toc896_467717262"/></text:h>
      <text:p text:style-name="P64">The name of the signal of each pin of the header is printed next to it at the bottom of the board. <text:span text:style-name="T49">You can find power in/out, GND, main UART, reset and power pins of the module and VDD_EXT that is 1.8V output (50mA max) or 1.8V VREF.</text:span></text:p>
      <text:p text:style-name="P64"><draw:frame draw:style-name="fr4" draw:name="Image5" text:anchor-type="paragraph" svg:width="5.1937in" style:rel-width="75%" svg:height="5.2346in" style:rel-height="58%" draw:z-index="26"><draw:image xlink:href="Pictures/10000001000002D0000002E0D0A8A83F.png" xlink:type="simple" xlink:show="embed" xlink:actuate="onLoad" draw:mime-type="image/png"/></draw:frame></text:p>
      <text:p text:style-name="P65">Never apply external power supply at EXT1 header and USB at the same time! This will lead to immediate short-circuit and hardware damage!</text:p>
      <text:p text:style-name="P66">Notice the board has no voltage level shifters on the data lines! Make sure your serial connection <text:span text:style-name="T50">works at 1.8V (usually data lines of the serial are at 3.3V or 5V and this will lead to hardware damage!).</text:span></text:p>
      <text:p text:style-name="P67">Consider using Olimex USB-SERIAL-L, remember to first connect Vref to VDD_EXT at EXT1 of USB-LTE4G so that USB-SERIAL-L buffers get set to 1.8V.</text:p>
      <text:h text:style-name="Heading_20_2" text:outline-level="2"><text:bookmark-start text:name="__RefHeading___Toc898_467717262"/><text:soft-page-break/><text:span text:style-name="T34">3</text:span>.4. LEDs<text:bookmark-end text:name="__RefHeading___Toc898_467717262"/></text:h>
      <text:p text:style-name="P68">The board has two status LEDs:</text:p>
      <text:p text:style-name="P69"><text:span text:style-name="T51"/></text:p>
      <text:p text:style-name="Standard"><text:span text:style-name="T52">- NetStat1 – </text:span><text:span text:style-name="T51">yellow color – shows the network status</text:span><text:span text:style-name="T52">:</text:span></text:p>
      <text:p text:style-name="Standard"><text:span text:style-name="T52"/></text:p>
      <text:list text:style-name="L5">
        <text:list-item>
          <text:p text:style-name="P70">Blink slowly (200ms High/1800ms Low) - search network</text:p>
        </text:list-item>
        <text:list-item>
          <text:p text:style-name="P70">Blink slowly (1800ms High/200ms Low) – idle</text:p>
        </text:list-item>
        <text:list-item>
          <text:p text:style-name="P70">Blink quickly (125ms High/125ms Low) – data transfer</text:p>
        </text:list-item>
      </text:list>
      <text:p text:style-name="Standard"><text:span text:style-name="T52"/></text:p>
      <text:p text:style-name="Standard"><text:span text:style-name="T52">- ModStat1 – </text:span><text:span text:style-name="T51">green color – shows the EG800K-EU module status when it is o</text:span>n – <text:span text:style-name="T53">the </text:span>module is turned on <text:span text:style-name="T53">normally.</text:span></text:p>
      <text:h text:style-name="Heading_20_2" text:outline-level="2"><text:bookmark-start text:name="__RefHeading___Toc900_467717262"/><text:span text:style-name="T34">3</text:span>.5. DFU1 PTH jumper<text:bookmark-end text:name="__RefHeading___Toc900_467717262"/></text:h>
      <text:p text:style-name="P71">This jumper is open by default. Close the jumper (e.g. solder the pads together) to enter firmware upgrade mode. </text:p>
      <text:p text:style-name="Text_20_body">Pulling down USB_BOOT to GND before turning on the module, and then the module will enter forced download mode. In this mode, the module supports firmware upgrade over USB 2.0 interface.</text:p>
      <text:p text:style-name="P71">Remember to <text:span text:style-name="T33">disconnect (</text:span>unsolder<text:span text:style-name="T33">)</text:span> the <text:span text:style-name="T33">jumper after a firmware upgrade to return to normal operation.</text:span></text:p>
      <text:h text:style-name="P41" text:outline-level="2"/>
      <text:h text:style-name="P15" text:outline-level="2"><text:bookmark-start text:name="__RefHeading___Toc1310_203368328"/>3.6. USB-LTE4G-EU board dimensions<text:bookmark-end text:name="__RefHeading___Toc1310_203368328"/></text:h>
      <text:h text:style-name="Heading_20_2" text:outline-level="2" text:is-list-header="true"><draw:frame draw:style-name="fr7" draw:name="Image7" text:anchor-type="paragraph" svg:width="5.1937in" style:rel-width="75%" svg:height="5.5055in" style:rel-height="61%" draw:z-index="28"><draw:image xlink:href="Pictures/10000001000003090000033DC99E538B.png" xlink:type="simple" xlink:show="embed" xlink:actuate="onLoad" draw:mime-type="image/png"/></draw:frame></text:h>
      <text:h text:style-name="P15" text:outline-level="2"><text:bookmark-start text:name="__RefHeading___Toc1408_203368328"/>3.7. BOX-LTE4G <text:span text:style-name="T49">dimensions</text:span><text:bookmark-end text:name="__RefHeading___Toc1408_203368328"/></text:h>
      <text:p text:style-name="P72">The box size in millimeters is <text:span text:style-name="T47">27x40x10</text:span>(WxLxH).</text:p>
      <text:p text:style-name="P73"><draw:frame draw:style-name="fr8" draw:name="Image12" text:anchor-type="paragraph" svg:width="4.1547in" style:rel-width="60%" svg:height="4.1516in" style:rel-height="46%" draw:z-index="33"><draw:image xlink:href="Pictures/10000000000007CC000007DA53DDF40E.jpg" xlink:type="simple" xlink:show="embed" xlink:actuate="onLoad" draw:mime-type="image/jpeg"/></draw:frame><draw:frame text:anchor-type="paragraph" draw:z-index="34" draw:name="Text Frame 1" draw:style-name="gr15" draw:text-style-name="P58" svg:width="0.6941in" svg:height="0.6941in" svg:x="1.2228in" svg:y="3.6909in"><draw:text-box><text:p>27mm</text:p></draw:text-box></draw:frame><draw:frame text:anchor-type="paragraph" draw:z-index="35" draw:name="Text Frame 2" draw:style-name="gr16" draw:text-style-name="P58" svg:width="1.198in" svg:height="0.8594in" svg:x="3.5665in" svg:y="2.4228in"><draw:text-box><text:p>40mm</text:p></draw:text-box></draw:frame><draw:frame text:anchor-type="paragraph" draw:z-index="36" draw:name="Text Frame 3" draw:style-name="gr17" draw:text-style-name="P58" svg:width="0.478in" svg:height="0.4953in" svg:x="-0.0709in" svg:y="2.9957in"><draw:text-box><text:p>10mm</text:p></draw:text-box></draw:frame></text:p>
      <text:h text:style-name="P15" text:outline-level="2"><text:bookmark-start text:name="__RefHeading___Toc2476_3915701551"/><text:span text:style-name="T28">3.</text:span><text:span text:style-name="T54">8</text:span><text:span text:style-name="T28">. </text:span>USB-<text:span text:style-name="T6">LTE4G-EU</text:span> power consumption<text:bookmark-end text:name="__RefHeading___Toc2476_3915701551"/></text:h>
      <text:p text:style-name="P74"><text:span text:style-name="T55">Warning! The 4G modem, like most modems has up to 2A transmission burst current consumption!</text:span> </text:p>
      <text:p text:style-name="P74">Make sure that your USB port and cable can handle it. <text:span text:style-name="T56">Consider using shorter USB-cable and maybe USB-CAP. If it is still shaky during some commands – consider external power supply (but never connect external power supply and USB at the same time!)</text:span></text:p>
      <text:list text:style-name="L6">
        <text:list-item>
          <text:p text:style-name="P75">0.2A @ Active operation</text:p>
        </text:list-item>
        <text:list-item>
          <text:p text:style-name="P75">22mA @ Idle</text:p>
        </text:list-item>
        <text:list-item>
          <text:p text:style-name="P75">3mA @ Sleep</text:p>
        </text:list-item>
        <text:list-item>
          <text:p text:style-name="P75">20uA @ Power off</text:p>
        </text:list-item>
      </text:list>
      <text:h text:style-name="P76" text:outline-level="1"><text:bookmark-start text:name="__RefHeading___Toc1025_467717262"/>4. Software<text:bookmark-end text:name="__RefHeading___Toc1025_467717262"/></text:h>
      <text:p text:style-name="P77">We tested some basic <text:span text:style-name="T57">software </text:span>operation, you can find our tests at GitHub, links below:</text:p>
      <text:p text:style-name="P78"><text:span text:style-name="T47">- Simple AT commands test: </text:span><text:a xlink:type="simple" xlink:href="https://github.com/OLIMEX/USB-LTE4G-EU/blob/main/SOFTWARE/Simple-AT-commands-test.txt" text:style-name="Internet_20_link" text:visited-style-name="Visited_20_Internet_20_Link"><text:span text:style-name="T46">Simple-AT-commands-test at GitHub</text:span></text:a></text:p>
      <text:p text:style-name="P78"><text:span text:style-name="T47">- PPP modem shell script and test: </text:span><text:a xlink:type="simple" xlink:href="https://github.com/OLIMEX/USB-LTE4G-EU/tree/main/SOFTWARE/WIFI-modem-ppp-interface" text:style-name="Internet_20_link" text:visited-style-name="Visited_20_Internet_20_Link"><text:span text:style-name="T46">WIFI-modem-ppp-interface at GitHub</text:span></text:a></text:p>
      <text:p text:style-name="P79">Usually drivers are not needed but if you have trouble check the archive below:</text:p>
      <text:p text:style-name="P78"><text:span text:style-name="T47">- Linux drivers: </text:span><text:a xlink:type="simple" xlink:href="https://github.com/OLIMEX/USB-LTE4G-EU/blob/main/SOFTWARE/Quectel_LTE5G_Linux_USB_Driver_V1.0-5.zip" text:style-name="Internet_20_link" text:visited-style-name="Visited_20_Internet_20_Link"><text:span text:style-name="T58">Quectel_LTE5G_Linux_USB_Driver_V1.0-5 at GitHub</text:span></text:a></text:p>
      <text:h text:style-name="Heading_20_1" text:outline-level="1"><text:bookmark-start text:name="__RefHeading___Toc1135_467717262"/>5. <text:span text:style-name="T59">Additional d</text:span>ocuments<text:bookmark-end text:name="__RefHeading___Toc1135_467717262"/></text:h>
      <text:p text:style-name="Text_20_body">- <text:span text:style-name="T60">EG800K series specification: </text:span><text:a xlink:type="simple" xlink:href="https://github.com/OLIMEX/USB-LTE4G-EU/blob/main/DOCs/Quectel_EG800K_Series_LTE_Standard_Specification_V1.3.pdf" text:style-name="Internet_20_link" text:visited-style-name="Visited_20_Internet_20_Link"><text:span text:style-name="T60">Quectel_EG800K_Series_LTE_Standard_Specification_V1.3 at GitHub</text:span></text:a></text:p>
      <text:p text:style-name="P78"><text:span text:style-name="T47">- AT commands manual: </text:span><text:a xlink:type="simple" xlink:href="https://github.com/OLIMEX/USB-LTE4G-EU/blob/main/DOCs/Quectel_ECx00xEG800AKEG800KEG810MEG91xNEG915KEG950A_Series_AT_Commands_Manual_V1.4.pdf" text:style-name="Internet_20_link" text:visited-style-name="Visited_20_Internet_20_Link"><text:span text:style-name="T58">AT_Commands_Manual_V1.4 at GitHub</text:span></text:a></text:p>
      <text:h text:style-name="P80" text:outline-level="1"><text:bookmark-start text:name="__RefHeading___Toc14695_1467883905"/>6. FAQ<text:bookmark-end text:name="__RefHeading___Toc14695_1467883905"/></text:h>
      <text:p text:style-name="Text_20_body">Some frequently asked question<text:span text:style-name="T60">s:</text:span></text:p>
      <text:p text:style-name="P81"><text:tab/>- What is the firmware version of the modules?</text:p>
      <text:p text:style-name="P82"><text:tab/><text:tab/>At the time of writing this document command ATI returns the following info:</text:p>
      <text:p text:style-name="P83"><text:tab/><text:tab/>ATI</text:p>
      <text:p text:style-name="P83"><text:tab/><text:tab/>Quectel</text:p>
      <text:p text:style-name="P83"><text:tab/><text:tab/>EG800K</text:p>
      <text:p text:style-name="P84"><text:span text:style-name="T61"><text:tab/><text:tab/>Revision: EG800KEULCR07A07M04</text:span></text:p>
      <text:h text:style-name="P9" text:outline-level="1"/>
      <text:h text:style-name="P38" text:outline-level="1"><text:bookmark-start text:name="__RefHeading___Toc1027_467717262"/><text:span text:style-name="T62">7</text:span>. Warranty and returns<text:bookmark-end text:name="__RefHeading___Toc1027_467717262"/></text:h>
      <text:p text:style-name="P85"><text:span text:style-name="T63">For product support, hardware information and error reports mail </text:span><text:span text:style-name="T64">at</text:span><text:span text:style-name="T63">: </text:span><text:a xlink:type="simple" xlink:href="mailto:support@olimex.com" text:style-name="Internet_20_link" text:visited-style-name="Visited_20_Internet_20_Link">support@olimex.com</text:a><text:span text:style-name="T63"> </text:span></text:p>
      <text:p text:style-name="P86"><text:span text:style-name="T65">All document or hardware feedback is welcome.</text:span><text:span text:style-name="T66"> Note that we are primarily a hardware company and our software support is limited. </text:span><text:span text:style-name="T67">Please consider reading the paragraph below about the warranty of Olimex products.</text:span></text:p>
      <text:p text:style-name="P86"><text:span text:style-name="T67"/></text:p>
      <text:p text:style-name="P87">All goods are checked before they are sent out. In the unlikely event that goods are faulty, they must be returned, to OLIMEX at the address listed on your order invoice.</text:p>
      <text:p text:style-name="P88">OLIMEX will not accept goods that have clearly been used more than the amount needed to evaluate their functionality.</text:p>
      <text:p text:style-name="P88">If the goods are found to be in working condition, and the lack of functionality is a result of lack of knowledge on the customers part, no refund will be made, but the goods will be returned to the user at their expense.</text:p>
      <text:p text:style-name="P88">All returns must be authorized by an RMA Number. Email support@olimex.com for authorization number before shipping back any merchandise. Please include your name, phone number and order number in your email request.</text:p>
      <text:p text:style-name="P88">Returns for any unaffected development board, programmer, tools, and cables permitted within 7 days from the date of receipt of merchandise. After such time, all sales are considered final.</text:p>
      <text:p text:style-name="P88">Returns of incorrect ordered items are allowed subject to a 10% restocking fee. What is unaffected? If you hooked it to power, you affected it. To be clear, this includes items that have been soldered to, or have had their firmware changed. Because of the nature of the products we deal with (prototyping electronic tools) we cannot allow returns of items that have been programmed, powered up, or otherwise changed post shipment from our warehouse.</text:p>
      <text:p text:style-name="P88">All returned merchandise must be in its original mint and clean condition. Returns on damaged, scratched, programmed, burnt, or otherwise 'played with' merchandise will not be accepted.</text:p>
      <text:p text:style-name="P88">All returns must include all the factory accessories which come with the item. This includes any In-Circuit-Serial-Programming cables, anti-static packing, boxes, etc.</text:p>
      <text:p text:style-name="P88">With your return, enclose your PO#. Also include a brief letter of explanation of why the merchandise is being returned and state your request for either a refund or an exchange. Include the authorization number on this letter, and on the outside of the shipping box.</text:p>
      <text:p text:style-name="P88">Please note: It is your <text:span text:style-name="T68">responsibility</text:span> to ensure that returned goods reach us. Please use a reliable form of shipping. If we do not receive your package we will not be held liable.</text:p>
      <text:p text:style-name="P88">Shipping and handling charges are not refundable. We are not responsible for any shipping charges of merchandise being returned to us or returning working items to you.</text:p>
      <text:p text:style-name="P89"><text:span text:style-name="T69">The full text might be found at </text:span><text:a xlink:type="simple" xlink:href="https://www.olimex.com/wiki/GTC#Warranty" text:style-name="Internet_20_link" text:visited-style-name="Visited_20_Internet_20_Link">https://www.olimex.com/wiki/GTC#Warranty</text:a><text:span text:style-name="T69"> for future </text:span><text:span text:style-name="T70">reference</text:span><text:span text:style-name="T69">.</text:span></text:p>
      <text:h text:style-name="P55" text:outline-level="1"><text:bookmark-start text:name="__RefHeading___Toc2484_3915701551"/><text:span text:style-name="T62">8</text:span><text:span text:style-name="T71">. </text:span><text:span text:style-name="T4">Document r</text:span>evision <text:span text:style-name="T4">h</text:span>istory<text:bookmark-end text:name="__RefHeading___Toc2484_3915701551"/></text:h>
      <text:p text:style-name="P90">Revision <text:span text:style-name="T72">2</text:span>.0 <text:span text:style-name="T4">June</text:span> 20<text:span text:style-name="T7">2</text:span><text:span text:style-name="T4">6</text:span></text:p>
      <text:p text:style-name="P91">- <text:span text:style-name="T72">filled empty sections and added more info</text:span></text:p>
      <text:p text:style-name="P91">Revision 1.0 <text:span text:style-name="T4">June</text:span> 20<text:span text:style-name="T7">2</text:span><text:span text:style-name="T4">6</text:span></text:p>
      <text:p text:style-name="P92">- <text:span text:style-name="T72">initial relea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Consolas" svg:font-family="Consola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1"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in" fo:margin-bottom="0.1in" style:contextual-spacing="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in" fo:margin-bottom="0.2in" style: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in" fo:margin-bottom="0.1in" style: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Lyubcho" style:display-name="Text body Lyubcho" style:family="paragraph" style:parent-style-name="Standard" style:class="text">
      <loext:graphic-properties draw:fill="none" draw:fill-color="#729fcf"/>
      <style:paragraph-properties fo:margin-left="0in" fo:margin-right="0in" fo:margin-top="0in" fo:margin-bottom="0in" style:contextual-spacing="false" fo:text-align="start" style:justify-single-word="false" fo:text-indent="0in" style:auto-text-indent="false" fo:background-color="transparent" style:shadow="none">
        <style:tab-stops/>
      </style:paragraph-properties>
      <style:text-properties style:font-name="Liberation Serif2" fo:font-family="'Liberation Serif'" style:font-style-name="Regular" style:font-family-generic="roman" style:font-pitch="variable" fo:font-size="12pt" fo:language="en" fo:country="US" fo:font-weight="normal" style:font-weight-asian="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6-06-09T13:39:51.212000000</dc:date>
    <meta:editing-duration>P1DT23H16M58S</meta:editing-duration>
    <meta:editing-cycles>153</meta:editing-cycles>
    <meta:generator>LibreOffice/24.8.0.3$Windows_X86_64 LibreOffice_project/0bdf1299c94fe897b119f97f3c613e9dca6be583</meta:generator>
    <meta:print-date>2026-06-04T16:47:00.664000000</meta:print-date>
    <meta:printed-by>PDF files</meta:printed-by>
    <meta:document-statistic meta:table-count="1" meta:image-count="12" meta:object-count="0" meta:page-count="21" meta:paragraph-count="222" meta:word-count="2547" meta:character-count="15230" meta:non-whitespace-character-count="12905"/>
  </office:meta>
</office:document-meta>
</file>